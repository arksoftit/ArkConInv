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D" style:family="table-column">
      <style:table-column-properties style:column-width="4.397cm" style:rel-column-width="16386*"/>
    </style:style>
    <style:style style:name="Tabla3.A1" style:family="table-cell">
      <style:table-cell-properties fo:padding="0.097cm" fo:border-left="0.5pt solid #000000" fo:border-right="none" fo:border-top="0.5pt solid #000000" fo:border-bottom="0.5pt solid #000000"/>
    </style:style>
    <style:style style:name="Tabla3.D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D" style:family="table-column">
      <style:table-column-properties style:column-width="4.397cm" style:rel-column-width="16386*"/>
    </style:style>
    <style:style style:name="Tabla4.A1" style:family="table-cell">
      <style:table-cell-properties fo:padding="0.097cm" fo:border-left="0.5pt solid #000000" fo:border-right="none" fo:border-top="0.5pt solid #000000" fo:border-bottom="0.5pt solid #000000"/>
    </style:style>
    <style:style style:name="Tabla4.D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5" style:family="table">
      <style:table-properties style:width="17.59cm" table:align="margins"/>
    </style:style>
    <style:style style:name="Tabla5.A" style:family="table-column">
      <style:table-column-properties style:column-width="5.863cm" style:rel-column-width="21845*"/>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59cm" table:align="margins"/>
    </style:style>
    <style:style style:name="Tabla6.A" style:family="table-column">
      <style:table-column-properties style:column-width="3.517cm" style:rel-column-width="13107*"/>
    </style:style>
    <style:style style:name="Tabla6.A1" style:family="table-cell">
      <style:table-cell-properties fo:padding="0.097cm" fo:border-left="0.5pt solid #000000" fo:border-right="none" fo:border-top="0.5pt solid #000000" fo:border-bottom="0.5pt solid #000000"/>
    </style:style>
    <style:style style:name="Tabla6.E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E2" style:family="table-cell">
      <style:table-cell-properties fo:padding="0.097cm" fo:border-left="0.5pt solid #000000" fo:border-right="0.5pt solid #000000" fo:border-top="none" fo:border-bottom="0.5pt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able_20_Heading">
      <style:paragraph-properties fo:text-align="left" style:justify-single-word="false"/>
    </style:style>
    <style:style style:name="P4" style:family="paragraph" style:parent-style-name="Table_20_Contents">
      <style:text-properties fo:font-weight="bold"/>
    </style:style>
    <style:style style:name="P5" style:family="paragraph" style:parent-style-name="Table_20_Contents">
      <style:paragraph-properties fo:text-align="left" style:justify-single-word="false"/>
    </style:style>
    <style:style style:name="P6" style:family="paragraph" style:parent-style-name="Preformatted_20_Text">
      <style:paragraph-properties fo:margin-top="0cm" fo:margin-bottom="0.499cm"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paragraph-properties fo:margin-top="0cm" fo:margin-bottom="0cm" style:contextual-spacing="false"/>
      <style:text-properties fo:font-weight="bold"/>
    </style:style>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2">
      <style:paragraph-properties fo:margin-top="0cm" fo:margin-bottom="0cm" style:contextual-spacing="false"/>
    </style:style>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paragraph-properties fo:margin-top="0cm" fo:margin-bottom="0cm" style:contextual-spacing="false"/>
    </style:style>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text-properties fo:font-weight="bold"/>
    </style:style>
    <style:style style:name="P38" style:family="paragraph" style:parent-style-name="Text_20_body" style:list-style-name="L27"/>
    <style:style style:name="P39" style:family="paragraph" style:parent-style-name="Text_20_body" style:list-style-name="L28">
      <style:text-properties fo:font-weight="bold"/>
    </style:style>
    <style:style style:name="P40" style:family="paragraph" style:parent-style-name="Text_20_body" style:list-style-name="L28"/>
    <style:style style:name="P41" style:family="paragraph" style:parent-style-name="Text_20_body" style:list-style-name="L29">
      <style:text-properties fo:font-weight="bold"/>
    </style:style>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5"/>
    <style:style style:name="P49" style:family="paragraph" style:parent-style-name="Text_20_body" style:list-style-name="L36"/>
    <style:style style:name="P50" style:family="paragraph" style:parent-style-name="Text_20_body" style:list-style-name="L37"/>
    <style:style style:name="P51" style:family="paragraph" style:parent-style-name="Text_20_body" style:list-style-name="L38"/>
    <style:style style:name="P52" style:family="paragraph" style:parent-style-name="Text_20_body" style:list-style-name="L39"/>
    <style:style style:name="P53" style:family="paragraph" style:parent-style-name="Text_20_body" style:list-style-name="L39">
      <style:paragraph-properties fo:margin-top="0cm" fo:margin-bottom="0cm" style:contextual-spacing="false"/>
    </style:style>
    <style:style style:name="P54" style:family="paragraph" style:parent-style-name="Text_20_body" style:list-style-name="L40"/>
    <style:style style:name="P55" style:family="paragraph" style:parent-style-name="Text_20_body" style:list-style-name="L41"/>
    <style:style style:name="P56" style:family="paragraph" style:parent-style-name="Text_20_body" style:list-style-name="L42"/>
    <style:style style:name="P57" style:family="paragraph" style:parent-style-name="Text_20_body" style:list-style-name="L43"/>
    <style:style style:name="P58" style:family="paragraph" style:parent-style-name="Text_20_body" style:list-style-name="L44"/>
    <style:style style:name="P59" style:family="paragraph" style:parent-style-name="Text_20_body" style:list-style-name="L45"/>
    <style:style style:name="P60" style:family="paragraph" style:parent-style-name="Text_20_body" style:list-style-name="L46"/>
    <style:style style:name="P61" style:family="paragraph" style:parent-style-name="Text_20_body" style:list-style-name="L47"/>
    <style:style style:name="T1" style:family="text">
      <style:text-properties fo:font-weight="bold"/>
    </style:style>
    <style:style style:name="T2" style:family="text">
      <style:text-properties style:font-name="Liberation Mono"/>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FORME DE AVANCE - PROYECTO ARKCONINV</text:h>
      <text:p text:style-name="P1">Sistema de Gestión y Consolidación de Inventarios</text:p>
      <text:p text:style-name="Text_20_body"><text:span text:style-name="T1">Fecha:</text:span> 17 de junio de 2026<text:line-break/><text:span text:style-name="T1">Ticket Principal:</text:span> ACI20260616001 - ACI20260617001<text:line-break/><text:span text:style-name="T1">Versión:</text:span> v0.1.01Beta<text:line-break/><text:span text:style-name="T1">Responsable:</text:span> Desarrollo en Python 3.14.4 (32 bits)</text:p>
      <text:p text:style-name="Horizontal_20_Line"/>
      <text:h text:style-name="Heading_20_2" text:outline-level="2">1. RESUMEN EJECUTIVO</text:h>
      <text:p text:style-name="Text_20_body">El proyecto <text:span text:style-name="T1">ArkConInv</text:span> es una aplicación de escritorio desarrollada en Python que permite la <text:span text:style-name="T1">consolidación de inventarios</text:span> desde múltiples unidades operativas con bases de datos DBISAM hacia una base de datos centralizada SQLite embebida. El sistema facilita el cálculo de existencias por períodos, generando saldos iniciales y finales mediante la integración de transacciones de ventas, compras y movimientos de inventario.</text:p>
      <text:p text:style-name="Horizontal_20_Line"/>
      <text:h text:style-name="Heading_20_2" text:outline-level="2">2. OBJETIVOS DEL PROYECTO</text:h>
      <text:h text:style-name="Heading_20_3" text:outline-level="3">2.1 Objetivo General</text:h>
      <text:p text:style-name="Text_20_body">Desarrollar una aplicación que consolide la gestión de inventario de dos o más unidades operativas con bases de datos DBISAM, permitiendo cálculos automatizados de existencias por períodos.</text:p>
      <text:h text:style-name="Heading_20_3" text:outline-level="3">2.2 Objetivos Específicos</text:h>
      <text:list text:style-name="L1">
        <text:list-item>
          <text:p text:style-name="P2">Importar datos desde DBISAM (solo lectura) hacia SQLite</text:p>
        </text:list-item>
        <text:list-item>
          <text:p text:style-name="P2">Unificar información de múltiples unidades operativas</text:p>
        </text:list-item>
        <text:list-item>
          <text:p text:style-name="P2">Calcular existencias: Inventario Inicial + Entradas - Salidas = Saldo Final</text:p>
        </text:list-item>
        <text:list-item>
          <text:p text:style-name="P2">Manejar versiones diferentes de DBISAM (A: 145 campos, H: 147 campos)</text:p>
        </text:list-item>
        <text:list-item>
          <text:p text:style-name="P2">Generar reportes de movimientos de inventario</text:p>
        </text:list-item>
        <text:list-item>
          <text:p text:style-name="P2">Soportar Python 3.14.4 de 32 bits (requisito del driver ODBC)</text:p>
        </text:list-item>
      </text:list>
      <text:p text:style-name="Horizontal_20_Line"/>
      <text:h text:style-name="Heading_20_2" text:outline-level="2"><text:soft-page-break/>3. ARQUITECTURA TÉCNICA</text:h>
      <text:h text:style-name="Heading_20_3" text:outline-level="3">3.1 Stack Tecnológico</text:h>
      <table:table table:name="Tabla1" table:style-name="Tabla1">
        <table:table-column table:style-name="Tabla1.A" table:number-columns-repeated="3"/>
        <table:table-column table:style-name="Tabla1.D"/>
        <table:table-header-rows>
          <table:table-row>
            <table:table-cell table:style-name="Tabla1.A1" office:value-type="string">
              <text:p text:style-name="P3">Componente</text:p>
            </table:table-cell>
            <table:table-cell table:style-name="Tabla1.A1" office:value-type="string">
              <text:p text:style-name="P3">Tecnología</text:p>
            </table:table-cell>
            <table:table-cell table:style-name="Tabla1.A1" office:value-type="string">
              <text:p text:style-name="P3">Versión</text:p>
            </table:table-cell>
            <table:table-cell table:style-name="Tabla1.D1" office:value-type="string">
              <text:p text:style-name="P3">Observaciones</text:p>
            </table:table-cell>
          </table:table-row>
        </table:table-header-rows>
        <table:table-row>
          <table:table-cell table:style-name="Tabla1.A2" office:value-type="string">
            <text:p text:style-name="P4">Lenguaje</text:p>
          </table:table-cell>
          <table:table-cell table:style-name="Tabla1.A2" office:value-type="string">
            <text:p text:style-name="P5">Python</text:p>
          </table:table-cell>
          <table:table-cell table:style-name="Tabla1.A2" office:value-type="string">
            <text:p text:style-name="P5">3.14.4 (32 bits)</text:p>
          </table:table-cell>
          <table:table-cell table:style-name="Tabla1.D2" office:value-type="string">
            <text:p text:style-name="P5">Obligatorio por driver ODBC</text:p>
          </table:table-cell>
        </table:table-row>
        <table:table-row>
          <table:table-cell table:style-name="Tabla1.A2" office:value-type="string">
            <text:p text:style-name="P4">UI Framework</text:p>
          </table:table-cell>
          <table:table-cell table:style-name="Tabla1.A2" office:value-type="string">
            <text:p text:style-name="P5">Tkinter/TTF</text:p>
          </table:table-cell>
          <table:table-cell table:style-name="Tabla1.A2" office:value-type="string">
            <text:p text:style-name="P5">-</text:p>
          </table:table-cell>
          <table:table-cell table:style-name="Tabla1.D2" office:value-type="string">
            <text:p text:style-name="P5">Interfaz nativa Windows</text:p>
          </table:table-cell>
        </table:table-row>
        <table:table-row>
          <table:table-cell table:style-name="Tabla1.A2" office:value-type="string">
            <text:p text:style-name="P4">BD Origen</text:p>
          </table:table-cell>
          <table:table-cell table:style-name="Tabla1.A2" office:value-type="string">
            <text:p text:style-name="P5">DBISAM</text:p>
          </table:table-cell>
          <table:table-cell table:style-name="Tabla1.A2" office:value-type="string">
            <text:p text:style-name="P5">4.x</text:p>
          </table:table-cell>
          <table:table-cell table:style-name="Tabla1.D2" office:value-type="string">
            <text:p text:style-name="P5">Driver ODBC 4.29.00.01</text:p>
          </table:table-cell>
        </table:table-row>
        <table:table-row>
          <table:table-cell table:style-name="Tabla1.A2" office:value-type="string">
            <text:p text:style-name="P4">BD Destino</text:p>
          </table:table-cell>
          <table:table-cell table:style-name="Tabla1.A2" office:value-type="string">
            <text:p text:style-name="P5">SQLite</text:p>
          </table:table-cell>
          <table:table-cell table:style-name="Tabla1.A2" office:value-type="string">
            <text:p text:style-name="P5">3.48.0</text:p>
          </table:table-cell>
          <table:table-cell table:style-name="Tabla1.D2" office:value-type="string">
            <text:p text:style-name="P5">Embebida</text:p>
          </table:table-cell>
        </table:table-row>
        <table:table-row>
          <table:table-cell table:style-name="Tabla1.A2" office:value-type="string">
            <text:p text:style-name="P4">Conexión BD</text:p>
          </table:table-cell>
          <table:table-cell table:style-name="Tabla1.A2" office:value-type="string">
            <text:p text:style-name="P5">PyODBC</text:p>
          </table:table-cell>
          <table:table-cell table:style-name="Tabla1.A2" office:value-type="string">
            <text:p text:style-name="P5">-</text:p>
          </table:table-cell>
          <table:table-cell table:style-name="Tabla1.D2" office:value-type="string">
            <text:p text:style-name="P5">Conexión ODBC</text:p>
          </table:table-cell>
        </table:table-row>
        <table:table-row>
          <table:table-cell table:style-name="Tabla1.A2" office:value-type="string">
            <text:p text:style-name="P4">Empaquetado</text:p>
          </table:table-cell>
          <table:table-cell table:style-name="Tabla1.A2" office:value-type="string">
            <text:p text:style-name="P5">PyInstaller</text:p>
          </table:table-cell>
          <table:table-cell table:style-name="Tabla1.A2" office:value-type="string">
            <text:p text:style-name="P5">-</text:p>
          </table:table-cell>
          <table:table-cell table:style-name="Tabla1.D2" office:value-type="string">
            <text:p text:style-name="P5">Generación de .exe</text:p>
          </table:table-cell>
        </table:table-row>
        <table:table-row>
          <table:table-cell table:style-name="Tabla1.A2" office:value-type="string">
            <text:p text:style-name="P4">SO</text:p>
          </table:table-cell>
          <table:table-cell table:style-name="Tabla1.A2" office:value-type="string">
            <text:p text:style-name="P5">Windows</text:p>
          </table:table-cell>
          <table:table-cell table:style-name="Tabla1.A2" office:value-type="string">
            <text:p text:style-name="P5">64/32 bits</text:p>
          </table:table-cell>
          <table:table-cell table:style-name="Tabla1.D2" office:value-type="string">
            <text:p text:style-name="P5">Compatible WOW6432Node</text:p>
          </table:table-cell>
        </table:table-row>
      </table:table>
      <text:p text:style-name="Text_20_body"/>
      <text:h text:style-name="Heading_20_3" text:outline-level="3">3.2 Estructura de Directorios</text:h>
      <text:p text:style-name="P6">ArkConInv/<text:line-break/>├── src/<text:line-break/>│ <text:s text:c="2"/>├── main.py <text:s text:c="19"/># Punto de entrada<text:line-break/>│ <text:s text:c="2"/>├── core/<text:line-break/>│ <text:s text:c="2"/>│ <text:s text:c="2"/>├── importar_transacciones.py <text:s/># Motor de importación<text:line-break/>│ <text:s text:c="2"/>│ <text:s text:c="2"/>└── system_info.py <text:s text:c="12"/># Info del sistema<text:line-break/>│ <text:s text:c="2"/>├── ui/<text:line-break/>│ <text:s text:c="2"/>│ <text:s text:c="2"/>├── dialog_import_transacciones.py <text:s/># Diálogo de importación<text:line-break/>│ <text:s text:c="2"/>│ <text:s text:c="2"/>└── [otras ventanas]<text:line-break/>│ <text:s text:c="2"/>└── db/<text:line-break/>│ <text:s text:c="6"/>└── embedded_db.py <text:s text:c="10"/># Conexión SQLite<text:line-break/>├── ArkConInvDB/<text:line-break/>│ <text:s text:c="2"/>└── database/<text:line-break/>│ <text:s text:c="6"/>└── arkconinv.db <text:s text:c="12"/># Base de datos SQLite<text:line-break/>├── config/<text:line-break/>│ <text:s text:c="2"/>└── conexiones.json <text:s text:c="13"/># Configuración ODBC<text:line-break/>└── assets/ <text:s text:c="25"/># Recursos gráficos</text:p>
      <text:p text:style-name="Horizontal_20_Line"/>
      <text:h text:style-name="Heading_20_2" text:outline-level="2">4. MÓDULOS DESARROLLADOS</text:h>
      <text:h text:style-name="Heading_20_3" text:outline-level="3">4.1 Módulo de Conexiones ✅ COMPLETADO</text:h>
      <text:p text:style-name="P1">Funcionalidad:</text:p>
      <text:list text:style-name="L2">
        <text:list-item>
          <text:p text:style-name="P7">Configuración de conexiones ODBC a DBISAM</text:p>
        </text:list-item>
        <text:list-item>
          <text:p text:style-name="P7">Almacenamiento de hasta 10 conexiones recientes en <text:span text:style-name="T2">conexiones.json</text:span></text:p>
        </text:list-item>
        <text:list-item>
          <text:p text:style-name="P7"><text:soft-page-break/>Combobox desplegable para selección de credenciales</text:p>
        </text:list-item>
        <text:list-item>
          <text:p text:style-name="P7">Validación de conexión activa</text:p>
        </text:list-item>
        <text:list-item>
          <text:p text:style-name="P7">Soporte para DSN, usuario y contraseña</text:p>
        </text:list-item>
      </text:list>
      <text:p text:style-name="Text_20_body"><text:span text:style-name="T1">Archivos:</text:span> <text:span text:style-name="T2">config/conexiones.json</text:span></text:p>
      <text:p text:style-name="Horizontal_20_Line"/>
      <text:h text:style-name="Heading_20_3" text:outline-level="3">4.2 Módulo de Importación de Transacciones ✅ EN AVANCE (85%)</text:h>
      <text:h text:style-name="Heading_20_4" text:outline-level="4">4.2.1 Interfaz de Usuario (<text:span text:style-name="T2">dialog_import_transacciones.py</text:span>) ✅ COMPLETADA</text:h>
      <text:p text:style-name="P1">Características implementadas:</text:p>
      <text:list text:style-name="L3">
        <text:list-item>
          <text:p text:style-name="P8">✅ Selección de Unidad Operativa (ComboBox dinámico)</text:p>
        </text:list-item>
        <text:list-item>
          <text:p text:style-name="P8">✅ Rango de fechas con máscara de entrada (dd/mm/aaaa)</text:p>
        </text:list-item>
        <text:list-item>
          <text:p text:style-name="P8">✅ Filtro por Depósito (todos o específico)</text:p>
        </text:list-item>
        <text:list-item>
          <text:p text:style-name="P8">✅ Filtro por Status (Procesada, Espera, Eliminadas, Tránsito, Anulada)</text:p>
        </text:list-item>
        <text:list-item>
          <text:p text:style-name="P9">✅ Selección múltiple de tablas:</text:p>
          <text:list>
            <text:list-item>
              <text:p text:style-name="P8">SOperacionInv (Cabecera)</text:p>
            </text:list-item>
            <text:list-item>
              <text:p text:style-name="P8">SDetalleVenta (Detalle Ventas)</text:p>
            </text:list-item>
            <text:list-item>
              <text:p text:style-name="P8">SDetalleCompra (Detalle Compras)</text:p>
            </text:list-item>
            <text:list-item>
              <text:p text:style-name="P8">SDetalleInv (Detalle Inventario)</text:p>
            </text:list-item>
          </text:list>
        </text:list-item>
        <text:list-item>
          <text:p text:style-name="P8">✅ Visualización de conexión activa</text:p>
        </text:list-item>
        <text:list-item>
          <text:p text:style-name="P8">✅ Barra de progreso en tiempo real</text:p>
        </text:list-item>
        <text:list-item>
          <text:p text:style-name="P8">✅ Ejecución en hilo secundario (no bloqueante)</text:p>
        </text:list-item>
        <text:list-item>
          <text:p text:style-name="P8">✅ Validación de fechas (Desde ≤ Hasta)</text:p>
        </text:list-item>
      </text:list>
      <text:p text:style-name="P1">Mejoras de UX:</text:p>
      <text:list text:style-name="L4">
        <text:list-item>
          <text:p text:style-name="P10">Máscara de entrada automática para fechas (formato dd/mm/aaaa)</text:p>
        </text:list-item>
        <text:list-item>
          <text:p text:style-name="P10">Actualización progresiva de barra (cada 50 registros)</text:p>
        </text:list-item>
        <text:list-item>
          <text:p text:style-name="P10">Mensajes de estado dinámicos</text:p>
        </text:list-item>
      </text:list>
      <text:h text:style-name="Heading_20_4" text:outline-level="4" text:is-list-header="true">4.2.2 Motor de Importación (<text:span text:style-name="T2">importar_transacciones.py</text:span>) ✅ COMPLETADO PARA SOPERACIONINV</text:h>
      <text:p text:style-name="P1">Funcionalidades implementadas:</text:p>
      <text:p text:style-name="P1">A. Importación de SOperacionInv (Cabecera) ✅ 100%</text:p>
      <text:list text:style-name="L5">
        <text:list-item>
          <text:p text:style-name="P11"><text:soft-page-break/>Detección automática de versión (A: 145 campos, H: 147 campos)</text:p>
        </text:list-item>
        <text:list-item>
          <text:p text:style-name="P11">Mapeo de 117 campos DBISAM → SQLite</text:p>
        </text:list-item>
        <text:list-item>
          <text:p text:style-name="P12">Conversión de tipos de datos:</text:p>
          <text:list>
            <text:list-item>
              <text:p text:style-name="P11"><text:span text:style-name="T2">bytes/bytearray</text:span> → UTF-8 (con manejo de errores)</text:p>
            </text:list-item>
            <text:list-item>
              <text:p text:style-name="P11"><text:span text:style-name="T2">Decimal</text:span> → float</text:p>
            </text:list-item>
            <text:list-item>
              <text:p text:style-name="P11"><text:span text:style-name="T2">time</text:span> → "HH:MM:SS"</text:p>
            </text:list-item>
            <text:list-item>
              <text:p text:style-name="P11"><text:span text:style-name="T2">date/datetime</text:span> → ISO 8601</text:p>
            </text:list-item>
          </text:list>
        </text:list-item>
        <text:list-item>
          <text:p text:style-name="P12">Campos de auditoría automáticos:</text:p>
          <text:list>
            <text:list-item>
              <text:p text:style-name="P11">SystemDate, SystemTime, NameMachine, UserCreator</text:p>
            </text:list-item>
            <text:list-item>
              <text:p text:style-name="P11">LastUpdateDate, LastUpdateTime, LastMachine, UserLastUpdate</text:p>
            </text:list-item>
          </text:list>
        </text:list-item>
        <text:list-item>
          <text:p text:style-name="P11">Manejo de campos de imprenta (versión A: "Ver. A", versión H: valores reales)</text:p>
        </text:list-item>
        <text:list-item>
          <text:p text:style-name="P12">Filtros aplicables:</text:p>
          <text:list>
            <text:list-item>
              <text:p text:style-name="P11">Por fecha de emisión</text:p>
            </text:list-item>
            <text:list-item>
              <text:p text:style-name="P11">Por depósito (source/destino)</text:p>
            </text:list-item>
            <text:list-item>
              <text:p text:style-name="P11">Por status</text:p>
            </text:list-item>
          </text:list>
        </text:list-item>
      </text:list>
      <text:p text:style-name="P1">Resultados de pruebas:</text:p>
      <text:list text:style-name="L6">
        <text:list-item>
          <text:p text:style-name="P13">✅ <text:span text:style-name="T1">UO 010102 (Versión H):</text:span> 144 registros importados correctamente</text:p>
        </text:list-item>
        <text:list-item>
          <text:p text:style-name="P13">✅ <text:span text:style-name="T1">UO 010101 (Versión A):</text:span> 947 registros importados correctamente</text:p>
        </text:list-item>
        <text:list-item>
          <text:p text:style-name="P13">✅ <text:span text:style-name="T1">Total verificado:</text:span> 1,091 registros en SQLiteStudio</text:p>
        </text:list-item>
      </text:list>
      <text:p text:style-name="P1">B. Importación de SDetalleVenta ️ EN DESARROLLO (70%)</text:p>
      <text:p text:style-name="P1">Estructura definida:</text:p>
      <text:list text:style-name="L7">
        <text:list-item>
          <text:p text:style-name="P14"><text:span text:style-name="T1">Campos origen:</text:span> 86 campos desde SDetalleVenta</text:p>
        </text:list-item>
        <text:list-item>
          <text:p text:style-name="P14"><text:span text:style-name="T1">Campos destino:</text:span> 97 columnas en <text:span text:style-name="T2">ark_detalletranvtas</text:span></text:p>
        </text:list-item>
        <text:list-item>
          <text:p text:style-name="P14"><text:span text:style-name="T1">Relación:</text:span> INNER JOIN con SOperacionInv por <text:span text:style-name="T2">FDI_OPERACION_AUTOINCREMENT</text:span></text:p>
        </text:list-item>
      </text:list>
      <text:p text:style-name="Text_20_body"><text:span text:style-name="T1">Mapeo documentado:</text:span> Archivo: <text:span text:style-name="T2">Analisis Origen Destino Campos SDetalleVtas.txt</text:span></text:p>
      <text:list text:style-name="L8">
        <text:list-item>
          <text:p text:style-name="P15">86 campos mapeados uno a uno</text:p>
        </text:list-item>
        <text:list-item>
          <text:p text:style-name="P15">3 campos especiales (Idauto, uo_id, uo_Codigo)</text:p>
        </text:list-item>
        <text:list-item>
          <text:p text:style-name="P15">8 campos de auditoría</text:p>
        </text:list-item>
      </text:list>
      <text:p text:style-name="P1">Campos críticos identificados:</text:p>
      <text:list text:style-name="L9">
        <text:list-item>
          <text:p text:style-name="P16">BLOB/LONGVARBINARY:</text:p>
          <text:list>
            <text:list-item>
              <text:p text:style-name="P17"><text:soft-page-break/><text:span text:style-name="T2">FDI_DETALLECOSTOSIMPORTACION</text:span> → <text:span text:style-name="T2">dtv_detallecostosimportacion</text:span></text:p>
            </text:list-item>
            <text:list-item>
              <text:p text:style-name="P17"><text:span text:style-name="T2">FDI_DETALLEPLANILLAIMPORTACION</text:span> → <text:span text:style-name="T2">dtv_detalleplanillaimportacion</text:span></text:p>
            </text:list-item>
            <text:list-item>
              <text:p text:style-name="P17">Conversión: <text:span text:style-name="T2">bytes</text:span> → UTF-8 con <text:span text:style-name="T2">errors='replace'</text:span></text:p>
            </text:list-item>
          </text:list>
        </text:list-item>
        <text:list-item>
          <text:p text:style-name="P16">BOOLEAN:</text:p>
          <text:list>
            <text:list-item>
              <text:p text:style-name="P17"><text:span text:style-name="T2">FDI_EXISTEDETALLEIMPORTACION</text:span> → INTEGER (0/1)</text:p>
            </text:list-item>
          </text:list>
        </text:list-item>
      </text:list>
      <text:p text:style-name="P1">Estado actual:</text:p>
      <text:list text:style-name="L10">
        <text:list-item>
          <text:p text:style-name="P18">✅ Estructura de campos definida (CAMPOS_SDETALLEVENTA)</text:p>
        </text:list-item>
        <text:list-item>
          <text:p text:style-name="P18">✅ Columnas destino definidas (COLUMNAS_DESTINO_DTV)</text:p>
        </text:list-item>
        <text:list-item>
          <text:p text:style-name="P18">✅ Función <text:span text:style-name="T2">importar_sdetalleventa()</text:span> creada</text:p>
        </text:list-item>
        <text:list-item>
          <text:p text:style-name="P18">✅ Lógica de conversión de tipos implementada</text:p>
        </text:list-item>
        <text:list-item>
          <text:p text:style-name="P18">✅ JOIN con cabecera implementado</text:p>
        </text:list-item>
        <text:list-item>
          <text:p text:style-name="P18">⚠️ <text:span text:style-name="T1">Pendiente:</text:span> Corrección de desfase de bindings (96 vs 97 campos)</text:p>
        </text:list-item>
      </text:list>
      <text:p text:style-name="P1">C. Tablas Pendientes:</text:p>
      <text:list text:style-name="L11">
        <text:list-item>
          <text:p text:style-name="P19">⏳ SDetalleCompra (Detalle Compras)</text:p>
        </text:list-item>
        <text:list-item>
          <text:p text:style-name="P19">⏳ SDetalleInv (Detalle Inventario)</text:p>
        </text:list-item>
      </text:list>
      <text:p text:style-name="Horizontal_20_Line"/>
      <text:h text:style-name="Heading_20_3" text:outline-level="3">4.3 Módulo de Unidades Operativas ✅ COMPLETADO</text:h>
      <text:p text:style-name="P1">Funcionalidad:</text:p>
      <text:list text:style-name="L12">
        <text:list-item>
          <text:p text:style-name="P20">Carga dinámica desde <text:span text:style-name="T2">ark_unds_operativas</text:span></text:p>
        </text:list-item>
        <text:list-item>
          <text:p text:style-name="P21">Cada UO tiene:</text:p>
          <text:list>
            <text:list-item>
              <text:p text:style-name="P20">ID único (uo_id)</text:p>
            </text:list-item>
            <text:list-item>
              <text:p text:style-name="P20">Código (uo_Codigo)</text:p>
            </text:list-item>
            <text:list-item>
              <text:p text:style-name="P20">Nombre (uo_nombre)</text:p>
            </text:list-item>
            <text:list-item>
              <text:p text:style-name="P20">Conexión ODBC independiente</text:p>
            </text:list-item>
          </text:list>
        </text:list-item>
        <text:list-item>
          <text:p text:style-name="P20">Filtrado por <text:span text:style-name="T2">uo_active = 1</text:span></text:p>
        </text:list-item>
      </text:list>
      <text:p text:style-name="Horizontal_20_Line"/>
      <text:h text:style-name="Heading_20_3" text:outline-level="3">4.4 Módulo de Depósitos ✅ COMPLETADO</text:h>
      <text:p text:style-name="P1">Funcionalidad:</text:p>
      <text:list text:style-name="L13">
        <text:list-item>
          <text:p text:style-name="P22">Carga dinámica desde <text:span text:style-name="T2">ark_depositos</text:span></text:p>
        </text:list-item>
        <text:list-item>
          <text:p text:style-name="P22"><text:soft-page-break/>Filtrado por unidad operativa (<text:span text:style-name="T2">dep_uo_origen</text:span>)</text:p>
        </text:list-item>
        <text:list-item>
          <text:p text:style-name="P22">Opción "Todos los depósitos" (ID = 0)</text:p>
        </text:list-item>
      </text:list>
      <text:p text:style-name="Horizontal_20_Line"/>
      <text:h text:style-name="Heading_20_3" text:outline-level="3">4.5 Base de Datos SQLite ✅ COMPLETADA</text:h>
      <text:p text:style-name="P1">Tablas creadas:</text:p>
      <text:p text:style-name="Text_20_body"><text:span text:style-name="T1">A. ark_transacciones</text:span> (Cabecera)</text:p>
      <text:list text:style-name="L14">
        <text:list-item>
          <text:p text:style-name="P23">158 columnas totales</text:p>
        </text:list-item>
        <text:list-item>
          <text:p text:style-name="P23">Primary Key: <text:span text:style-name="T2">trn_Idauto</text:span> (AUTOINCREMENT)</text:p>
        </text:list-item>
        <text:list-item>
          <text:p text:style-name="P23">Foreign Key: <text:span text:style-name="T2">trn_uo_id</text:span> → <text:span text:style-name="T2">ark_unds_operativas</text:span></text:p>
        </text:list-item>
        <text:list-item>
          <text:p text:style-name="P23">Índices en campos de búsqueda frecuente</text:p>
        </text:list-item>
      </text:list>
      <text:p text:style-name="Text_20_body"><text:span text:style-name="T1">B. ark_detalletranvtas</text:span> (Detalle Ventas)</text:p>
      <text:list text:style-name="L15">
        <text:list-item>
          <text:p text:style-name="P24">97 columnas totales</text:p>
        </text:list-item>
        <text:list-item>
          <text:p text:style-name="P24">Primary Key: <text:span text:style-name="T2">dtv_Idauto</text:span> (AUTOINCREMENT)</text:p>
        </text:list-item>
        <text:list-item>
          <text:p text:style-name="P24">Foreign Key: <text:span text:style-name="T2">dtv_uo_id</text:span> → <text:span text:style-name="T2">ark_unds_operativas</text:span></text:p>
        </text:list-item>
        <text:list-item>
          <text:p text:style-name="P24">Campos de auditoría incluidos</text:p>
        </text:list-item>
      </text:list>
      <text:p text:style-name="Text_20_body"><text:span text:style-name="T1">C. ark_unds_operativas</text:span> (Unidades Operativas)</text:p>
      <text:list text:style-name="L16">
        <text:list-item>
          <text:p text:style-name="P25">uo_id, uo_Codigo, uo_nombre, uo_active</text:p>
        </text:list-item>
      </text:list>
      <text:p text:style-name="Text_20_body"><text:span text:style-name="T1">D. ark_depositos</text:span> (Depósitos)</text:p>
      <text:list text:style-name="L17">
        <text:list-item>
          <text:p text:style-name="P26">dep_IDauto, dep_codigo, dep_descripcion, dep_uo_origen</text:p>
        </text:list-item>
      </text:list>
      <text:p text:style-name="P1">E. Tablas adicionales:</text:p>
      <text:list text:style-name="L18">
        <text:list-item>
          <text:p text:style-name="P27">ark_categoria</text:p>
        </text:list-item>
        <text:list-item>
          <text:p text:style-name="P27">ark_company</text:p>
        </text:list-item>
        <text:list-item>
          <text:p text:style-name="P27">ark_inventario</text:p>
        </text:list-item>
        <text:list-item>
          <text:p text:style-name="P27">ark_status_operacion</text:p>
        </text:list-item>
        <text:list-item>
          <text:p text:style-name="P27">ark_tipos_operacion</text:p>
        </text:list-item>
        <text:list-item>
          <text:p text:style-name="P27">ark_users</text:p>
        </text:list-item>
      </text:list>
      <text:p text:style-name="Horizontal_20_Line"/>
      <text:h text:style-name="Heading_20_2" text:outline-level="2"><text:soft-page-break/>5. FUNCIONALIDADES IMPLEMENTADAS</text:h>
      <text:h text:style-name="Heading_20_3" text:outline-level="3">5.1 Gestión de Datos</text:h>
      <text:list text:style-name="L19">
        <text:list-item>
          <text:p text:style-name="P28">✅ Lectura desde DBISAM (solo lectura)</text:p>
        </text:list-item>
        <text:list-item>
          <text:p text:style-name="P28">✅ Inserción en SQLite con <text:span text:style-name="T2">INSERT OR IGNORE</text:span></text:p>
        </text:list-item>
        <text:list-item>
          <text:p text:style-name="P28">✅ Conversión automática de tipos de datos</text:p>
        </text:list-item>
        <text:list-item>
          <text:p text:style-name="P28">✅ Manejo de campos BLOB/LONGVARBINARY</text:p>
        </text:list-item>
        <text:list-item>
          <text:p text:style-name="P28">✅ Soporte para fechas/horas en diferentes formatos</text:p>
        </text:list-item>
      </text:list>
      <text:h text:style-name="Heading_20_3" text:outline-level="3" text:is-list-header="true">5.2 Interfaz de Usuario</text:h>
      <text:list text:style-name="L20">
        <text:list-item>
          <text:p text:style-name="P29">✅ Ventanas modales centradas</text:p>
        </text:list-item>
        <text:list-item>
          <text:p text:style-name="P29">✅ Validación de campos obligatorios</text:p>
        </text:list-item>
        <text:list-item>
          <text:p text:style-name="P29">✅ Mensajes de error/éxito descriptivos</text:p>
        </text:list-item>
        <text:list-item>
          <text:p text:style-name="P29">✅ Barra de progreso en tiempo real</text:p>
        </text:list-item>
        <text:list-item>
          <text:p text:style-name="P29">✅ Estados de conexión visibles</text:p>
        </text:list-item>
        <text:list-item>
          <text:p text:style-name="P29">✅ Máscaras de entrada para fechas</text:p>
        </text:list-item>
      </text:list>
      <text:h text:style-name="Heading_20_3" text:outline-level="3" text:is-list-header="true">5.3 Rendimiento</text:h>
      <text:list text:style-name="L21">
        <text:list-item>
          <text:p text:style-name="P30">✅ Procesamiento en hilos secundarios (threading)</text:p>
        </text:list-item>
        <text:list-item>
          <text:p text:style-name="P30">✅ Actualización UI thread-safe con <text:span text:style-name="T2">after(0, ...)</text:span></text:p>
        </text:list-item>
        <text:list-item>
          <text:p text:style-name="P30">✅ Progreso cada 50 registros (balance rendimiento/UX)</text:p>
        </text:list-item>
        <text:list-item>
          <text:p text:style-name="P30">✅ Conexiones DBISAM con autocommit</text:p>
        </text:list-item>
      </text:list>
      <text:h text:style-name="Heading_20_3" text:outline-level="3" text:is-list-header="true">5.4 Auditoría</text:h>
      <text:list text:style-name="L22">
        <text:list-item>
          <text:p text:style-name="P31">✅ Registro automático de:</text:p>
          <text:list>
            <text:list-item>
              <text:p text:style-name="P32">Fecha/hora de creación</text:p>
            </text:list-item>
            <text:list-item>
              <text:p text:style-name="P32">Máquina de origen</text:p>
            </text:list-item>
            <text:list-item>
              <text:p text:style-name="P32">Usuario creador</text:p>
            </text:list-item>
            <text:list-item>
              <text:p text:style-name="P32">Fecha/hora de última modificación</text:p>
            </text:list-item>
            <text:list-item>
              <text:p text:style-name="P32">Máquina de última modificación</text:p>
            </text:list-item>
            <text:list-item>
              <text:p text:style-name="P32">Usuario de última modificación</text:p>
            </text:list-item>
          </text:list>
        </text:list-item>
      </text:list>
      <text:p text:style-name="Horizontal_20_Line"/>
      <text:h text:style-name="Heading_20_2" text:outline-level="2"><text:soft-page-break/>6. LOGROS TÉCNICOS DESTACADOS</text:h>
      <text:h text:style-name="Heading_20_3" text:outline-level="3">6.1 Compatibilidad 32/64 bits</text:h>
      <text:list text:style-name="L23">
        <text:list-item>
          <text:p text:style-name="P33">✅ Lectura de DSN desde <text:span text:style-name="T2">WOW6432Node</text:span> en registro Windows</text:p>
        </text:list-item>
        <text:list-item>
          <text:p text:style-name="P33">✅ Fallback con <text:span text:style-name="T2">DB_DIRECTORY()</text:span> de DBISAM</text:p>
        </text:list-item>
        <text:list-item>
          <text:p text:style-name="P33">✅ Python 32 bits obligatorio para driver ODBC</text:p>
        </text:list-item>
      </text:list>
      <text:h text:style-name="Heading_20_3" text:outline-level="3" text:is-list-header="true">6.2 Manejo de Versiones DBISAM</text:h>
      <text:list text:style-name="L24">
        <text:list-item>
          <text:p text:style-name="P34">✅ Detección automática por conteo de campos (145 vs 147)</text:p>
        </text:list-item>
        <text:list-item>
          <text:p text:style-name="P34">✅ Adaptación dinámica de consultas SQL</text:p>
        </text:list-item>
        <text:list-item>
          <text:p text:style-name="P34">✅ Campos condicionales según versión</text:p>
        </text:list-item>
      </text:list>
      <text:h text:style-name="Heading_20_3" text:outline-level="3" text:is-list-header="true">6.3 Conversión de Tipos Complejos</text:h>
      <text:p text:style-name="P6"># bytes/bytearray (BLOB)<text:line-break/>value.decode('utf-8', errors='replace')<text:line-break/><text:line-break/># Decimal<text:line-break/>float(value) if value is not None else None<text:line-break/><text:line-break/># time<text:line-break/>value.strftime("%H:%M:%S")<text:line-break/><text:line-break/># date/datetime<text:line-break/>value.isoformat()</text:p>
      <text:h text:style-name="Heading_20_3" text:outline-level="3">6.4 Documentación Técnica</text:h>
      <text:list text:style-name="L25">
        <text:list-item>
          <text:p text:style-name="P35">✅ Archivo de mapeo campo a campo (<text:span text:style-name="T2">Analisis Origen Destino Campos SDetalleVtas.txt</text:span>)</text:p>
        </text:list-item>
        <text:list-item>
          <text:p text:style-name="P35">✅ Estructuras DBISAM → SQLite documentadas</text:p>
        </text:list-item>
        <text:list-item>
          <text:p text:style-name="P35">✅ Tickets numerados (ACI+Año+Mes+Día+Correlativo)</text:p>
        </text:list-item>
      </text:list>
      <text:p text:style-name="Horizontal_20_Line"/>
      <text:h text:style-name="Heading_20_2" text:outline-level="2">7. ESTADO ACTUAL DEL PROYECTO</text:h>
      <text:h text:style-name="Heading_20_3" text:outline-level="3">7.1 Progreso General: <text:span text:style-name="T1">65%</text:span></text:h>
      <table:table table:name="Tabla2" table:style-name="Tabla2">
        <table:table-column table:style-name="Tabla2.A" table:number-columns-repeated="3"/>
        <table:table-header-rows>
          <table:table-row>
            <table:table-cell table:style-name="Tabla2.A1" office:value-type="string">
              <text:p text:style-name="P3">Módulo</text:p>
            </table:table-cell>
            <table:table-cell table:style-name="Tabla2.A1" office:value-type="string">
              <text:p text:style-name="P3">Estado</text:p>
            </table:table-cell>
            <table:table-cell table:style-name="Tabla2.C1" office:value-type="string">
              <text:p text:style-name="P3">% Completado</text:p>
            </table:table-cell>
          </table:table-row>
        </table:table-header-rows>
        <table:table-row>
          <table:table-cell table:style-name="Tabla2.A2" office:value-type="string">
            <text:p text:style-name="P5">Conexiones ODBC</text:p>
          </table:table-cell>
          <table:table-cell table:style-name="Tabla2.A2" office:value-type="string">
            <text:p text:style-name="P5">✅ Completado</text:p>
          </table:table-cell>
          <table:table-cell table:style-name="Tabla2.C2" office:value-type="string">
            <text:p text:style-name="P5">100%</text:p>
          </table:table-cell>
        </table:table-row>
        <table:table-row>
          <table:table-cell table:style-name="Tabla2.A2" office:value-type="string">
            <text:p text:style-name="P5">UI Importación</text:p>
          </table:table-cell>
          <table:table-cell table:style-name="Tabla2.A2" office:value-type="string">
            <text:p text:style-name="P5">✅ Completado</text:p>
          </table:table-cell>
          <table:table-cell table:style-name="Tabla2.C2" office:value-type="string">
            <text:p text:style-name="P5">100%</text:p>
          </table:table-cell>
        </table:table-row>
        <table:table-row>
          <table:table-cell table:style-name="Tabla2.A2" office:value-type="string">
            <text:p text:style-name="P5">Importación SOperacionInv</text:p>
          </table:table-cell>
          <table:table-cell table:style-name="Tabla2.A2" office:value-type="string">
            <text:p text:style-name="P5">✅ Completado</text:p>
          </table:table-cell>
          <table:table-cell table:style-name="Tabla2.C2" office:value-type="string">
            <text:p text:style-name="P5">100%</text:p>
          </table:table-cell>
        </table:table-row>
        <text:soft-page-break/>
        <table:table-row>
          <table:table-cell table:style-name="Tabla2.A2" office:value-type="string">
            <text:p text:style-name="P5">Importación SDetalleVenta</text:p>
          </table:table-cell>
          <table:table-cell table:style-name="Tabla2.A2" office:value-type="string">
            <text:p text:style-name="P5">⚠️ En desarrollo</text:p>
          </table:table-cell>
          <table:table-cell table:style-name="Tabla2.C2" office:value-type="string">
            <text:p text:style-name="P5">70%</text:p>
          </table:table-cell>
        </table:table-row>
        <table:table-row>
          <table:table-cell table:style-name="Tabla2.A2" office:value-type="string">
            <text:p text:style-name="P5">Importación SDetalleCompra</text:p>
          </table:table-cell>
          <table:table-cell table:style-name="Tabla2.A2" office:value-type="string">
            <text:p text:style-name="P5">⏳ Pendiente</text:p>
          </table:table-cell>
          <table:table-cell table:style-name="Tabla2.C2" office:value-type="string">
            <text:p text:style-name="P5">0%</text:p>
          </table:table-cell>
        </table:table-row>
        <table:table-row>
          <table:table-cell table:style-name="Tabla2.A2" office:value-type="string">
            <text:p text:style-name="P5">Importación SDetalleInv</text:p>
          </table:table-cell>
          <table:table-cell table:style-name="Tabla2.A2" office:value-type="string">
            <text:p text:style-name="P5">⏳ Pendiente</text:p>
          </table:table-cell>
          <table:table-cell table:style-name="Tabla2.C2" office:value-type="string">
            <text:p text:style-name="P5">0%</text:p>
          </table:table-cell>
        </table:table-row>
        <table:table-row>
          <table:table-cell table:style-name="Tabla2.A2" office:value-type="string">
            <text:p text:style-name="P5">Cálculo de Existencias</text:p>
          </table:table-cell>
          <table:table-cell table:style-name="Tabla2.A2" office:value-type="string">
            <text:p text:style-name="P5">⏳ Pendiente</text:p>
          </table:table-cell>
          <table:table-cell table:style-name="Tabla2.C2" office:value-type="string">
            <text:p text:style-name="P5">0%</text:p>
          </table:table-cell>
        </table:table-row>
        <table:table-row>
          <table:table-cell table:style-name="Tabla2.A2" office:value-type="string">
            <text:p text:style-name="P5">Reportes</text:p>
          </table:table-cell>
          <table:table-cell table:style-name="Tabla2.A2" office:value-type="string">
            <text:p text:style-name="P5">⏳ Pendiente</text:p>
          </table:table-cell>
          <table:table-cell table:style-name="Tabla2.C2" office:value-type="string">
            <text:p text:style-name="P5">0%</text:p>
          </table:table-cell>
        </table:table-row>
        <table:table-row>
          <table:table-cell table:style-name="Tabla2.A2" office:value-type="string">
            <text:p text:style-name="P5">Empaquetado .exe</text:p>
          </table:table-cell>
          <table:table-cell table:style-name="Tabla2.A2" office:value-type="string">
            <text:p text:style-name="P5">⏳ Pendiente</text:p>
          </table:table-cell>
          <table:table-cell table:style-name="Tabla2.C2" office:value-type="string">
            <text:p text:style-name="P5">0%</text:p>
          </table:table-cell>
        </table:table-row>
      </table:table>
      <text:p text:style-name="Text_20_body"/>
      <text:h text:style-name="Heading_20_3" text:outline-level="3">7.2 Métricas de Calidad</text:h>
      <text:list text:style-name="L26">
        <text:list-item>
          <text:p text:style-name="P36"><text:span text:style-name="T1">Código limpio:</text:span> Sin comentarios que estorben</text:p>
        </text:list-item>
        <text:list-item>
          <text:p text:style-name="P36"><text:span text:style-name="T1">Directivas cumplidas:</text:span> Paso a paso, comando a comando</text:p>
        </text:list-item>
        <text:list-item>
          <text:p text:style-name="P36"><text:span text:style-name="T1">Pruebas realizadas:</text:span> 2 unidades operativas validadas</text:p>
        </text:list-item>
        <text:list-item>
          <text:p text:style-name="P36"><text:span text:style-name="T1">Errores críticos:</text:span> 0 en producción</text:p>
        </text:list-item>
        <text:list-item>
          <text:p text:style-name="P36"><text:span text:style-name="T1">Tickets abiertos:</text:span> 1 (ACI20260617001 - SDetalleVenta)</text:p>
        </text:list-item>
      </text:list>
      <text:p text:style-name="Horizontal_20_Line"/>
      <text:h text:style-name="Heading_20_2" text:outline-level="2">8. PENDIENTES Y PRÓXIMOS PASOS</text:h>
      <text:h text:style-name="Heading_20_3" text:outline-level="3">8.1 Corto Plazo (Esta semana)</text:h>
      <text:list text:style-name="L27">
        <text:list-item>
          <text:p text:style-name="P37">Corregir desfase de bindings en SDetalleVenta</text:p>
          <text:list>
            <text:list-item>
              <text:p text:style-name="P38">Error actual: "97 bindings expected, 96 supplied"</text:p>
            </text:list-item>
            <text:list-item>
              <text:p text:style-name="P38">Causa: Falta <text:span text:style-name="T2">dtv_totalpeso</text:span> en COLUMNAS_DESTINO_DTV</text:p>
            </text:list-item>
            <text:list-item>
              <text:p text:style-name="P38">Solución: Agregar campo entre <text:span text:style-name="T2">dtv_base_autoincrement</text:span> y <text:span text:style-name="T2">dtv_ctocosto</text:span></text:p>
            </text:list-item>
          </text:list>
        </text:list-item>
        <text:list-item>
          <text:p text:style-name="P37">Validar importación completa de SDetalleVenta</text:p>
          <text:list>
            <text:list-item>
              <text:p text:style-name="P38">Pruebas con UO 010101 y 010102</text:p>
            </text:list-item>
            <text:list-item>
              <text:p text:style-name="P38">Verificación de campos BLOB</text:p>
            </text:list-item>
            <text:list-item>
              <text:p text:style-name="P38">Validación de JOIN con cabecera</text:p>
            </text:list-item>
          </text:list>
        </text:list-item>
        <text:list-item>
          <text:p text:style-name="P37">Implementar SDetalleCompra</text:p>
          <text:list>
            <text:list-item>
              <text:p text:style-name="P38">Definir estructura de campos</text:p>
            </text:list-item>
            <text:list-item>
              <text:p text:style-name="P38">Crear función de importación</text:p>
            </text:list-item>
            <text:list-item>
              <text:p text:style-name="P38">Validar con datos reales</text:p>
            </text:list-item>
          </text:list>
        </text:list-item>
      </text:list>
      <text:h text:style-name="Heading_20_3" text:outline-level="3" text:is-list-header="true"><text:soft-page-break/>8.2 Mediano Plazo (Próximas 2 semanas)</text:h>
      <text:list text:style-name="L28">
        <text:list-item>
          <text:p text:style-name="P39">Implementar SDetalleInv</text:p>
          <text:list>
            <text:list-item>
              <text:p text:style-name="P40">Mapeo de campos</text:p>
            </text:list-item>
            <text:list-item>
              <text:p text:style-name="P40">Lógica de importación</text:p>
            </text:list-item>
            <text:list-item>
              <text:p text:style-name="P40">Pruebas de integración</text:p>
            </text:list-item>
          </text:list>
        </text:list-item>
        <text:list-item>
          <text:p text:style-name="P39">Módulo de Cálculo de Existencias</text:p>
          <text:list>
            <text:list-item>
              <text:p text:style-name="P40">Algoritmo: Inventario Inicial + Compras - Ventas = Saldo</text:p>
            </text:list-item>
            <text:list-item>
              <text:p text:style-name="P40">Soporte para cálculo inverso (sin saldos iniciales)</text:p>
            </text:list-item>
            <text:list-item>
              <text:p text:style-name="P40">Agrupación por período (mensual/anual)</text:p>
            </text:list-item>
          </text:list>
        </text:list-item>
        <text:list-item>
          <text:p text:style-name="P39">Módulo de Reportes</text:p>
          <text:list>
            <text:list-item>
              <text:p text:style-name="P40">Movimiento de Unidades (Art. 177 ISLR)</text:p>
            </text:list-item>
            <text:list-item>
              <text:p text:style-name="P40">Existencias por período</text:p>
            </text:list-item>
            <text:list-item>
              <text:p text:style-name="P40">Consolidado por unidad operativa</text:p>
            </text:list-item>
          </text:list>
        </text:list-item>
      </text:list>
      <text:h text:style-name="Heading_20_3" text:outline-level="3" text:is-list-header="true">8.3 Largo Plazo (Próximo mes)</text:h>
      <text:list text:style-name="L29">
        <text:list-item>
          <text:p text:style-name="P41">Mejoras de UI</text:p>
          <text:list>
            <text:list-item>
              <text:p text:style-name="P42">Selector de períodos (Mes/Año) tipo Fast Report</text:p>
            </text:list-item>
            <text:list-item>
              <text:p text:style-name="P42">Exportación a Excel/PDF</text:p>
            </text:list-item>
            <text:list-item>
              <text:p text:style-name="P42">Gráficos de tendencias</text:p>
            </text:list-item>
          </text:list>
        </text:list-item>
        <text:list-item>
          <text:p text:style-name="P41">Empaquetado</text:p>
          <text:list>
            <text:list-item>
              <text:p text:style-name="P42">Compilación a .exe con PyInstaller</text:p>
            </text:list-item>
            <text:list-item>
              <text:p text:style-name="P42">Instalador automático</text:p>
            </text:list-item>
            <text:list-item>
              <text:p text:style-name="P42">Documentación de usuario</text:p>
            </text:list-item>
          </text:list>
        </text:list-item>
      </text:list>
      <text:p text:style-name="Horizontal_20_Line"/>
      <text:h text:style-name="Heading_20_2" text:outline-level="2">9. RIESGOS IDENTIFICADOS</text:h>
      <text:h text:style-name="Heading_20_3" text:outline-level="3">9.1 Riesgos Técnicos</text:h>
      <table:table table:name="Tabla3" table:style-name="Tabla3">
        <table:table-column table:style-name="Tabla3.A" table:number-columns-repeated="3"/>
        <table:table-column table:style-name="Tabla3.D"/>
        <table:table-header-rows>
          <table:table-row>
            <table:table-cell table:style-name="Tabla3.A1" office:value-type="string">
              <text:p text:style-name="P3">Riesgo</text:p>
            </table:table-cell>
            <table:table-cell table:style-name="Tabla3.A1" office:value-type="string">
              <text:p text:style-name="P3">Probabilidad</text:p>
            </table:table-cell>
            <table:table-cell table:style-name="Tabla3.A1" office:value-type="string">
              <text:p text:style-name="P3">Impacto</text:p>
            </table:table-cell>
            <table:table-cell table:style-name="Tabla3.D1" office:value-type="string">
              <text:p text:style-name="P3">Mitigación</text:p>
            </table:table-cell>
          </table:table-row>
        </table:table-header-rows>
        <table:table-row>
          <table:table-cell table:style-name="Tabla3.A2" office:value-type="string">
            <text:p text:style-name="P5">Incompatibilidad driver ODBC 32/64 bits</text:p>
          </table:table-cell>
          <table:table-cell table:style-name="Tabla3.A2" office:value-type="string">
            <text:p text:style-name="P5">Baja</text:p>
          </table:table-cell>
          <table:table-cell table:style-name="Tabla3.A2" office:value-type="string">
            <text:p text:style-name="P5">Alto</text:p>
          </table:table-cell>
          <table:table-cell table:style-name="Tabla3.D2" office:value-type="string">
            <text:p text:style-name="P5">Uso exclusivo de Python 32 bits</text:p>
          </table:table-cell>
        </table:table-row>
        <table:table-row>
          <table:table-cell table:style-name="Tabla3.A2" office:value-type="string">
            <text:p text:style-name="P5">Campos BLOB muy <text:soft-page-break/>grandes</text:p>
          </table:table-cell>
          <table:table-cell table:style-name="Tabla3.A2" office:value-type="string">
            <text:p text:style-name="P5">Media</text:p>
          </table:table-cell>
          <table:table-cell table:style-name="Tabla3.A2" office:value-type="string">
            <text:p text:style-name="P5">Medio</text:p>
          </table:table-cell>
          <table:table-cell table:style-name="Tabla3.D2" office:value-type="string">
            <text:p text:style-name="Table_20_Contents">Decodificación con <text:soft-page-break/><text:span text:style-name="T2">errors='replace'</text:span></text:p>
          </table:table-cell>
        </table:table-row>
        <table:table-row>
          <table:table-cell table:style-name="Tabla3.A2" office:value-type="string">
            <text:p text:style-name="P5">Rendimiento con grandes volúmenes</text:p>
          </table:table-cell>
          <table:table-cell table:style-name="Tabla3.A2" office:value-type="string">
            <text:p text:style-name="P5">Media</text:p>
          </table:table-cell>
          <table:table-cell table:style-name="Tabla3.A2" office:value-type="string">
            <text:p text:style-name="P5">Medio</text:p>
          </table:table-cell>
          <table:table-cell table:style-name="Tabla3.D2" office:value-type="string">
            <text:p text:style-name="P5">Procesamiento por lotes (50 registros)</text:p>
          </table:table-cell>
        </table:table-row>
        <table:table-row>
          <table:table-cell table:style-name="Tabla3.A2" office:value-type="string">
            <text:p text:style-name="P5">Diferencias entre versiones DBISAM</text:p>
          </table:table-cell>
          <table:table-cell table:style-name="Tabla3.A2" office:value-type="string">
            <text:p text:style-name="P5">Baja</text:p>
          </table:table-cell>
          <table:table-cell table:style-name="Tabla3.A2" office:value-type="string">
            <text:p text:style-name="P5">Alto</text:p>
          </table:table-cell>
          <table:table-cell table:style-name="Tabla3.D2" office:value-type="string">
            <text:p text:style-name="P5">Detección automática y adaptación</text:p>
          </table:table-cell>
        </table:table-row>
      </table:table>
      <text:p text:style-name="Text_20_body"/>
      <text:h text:style-name="Heading_20_3" text:outline-level="3">9.2 Riesgos de Proyecto</text:h>
      <table:table table:name="Tabla4" table:style-name="Tabla4">
        <table:table-column table:style-name="Tabla4.A" table:number-columns-repeated="3"/>
        <table:table-column table:style-name="Tabla4.D"/>
        <table:table-header-rows>
          <table:table-row>
            <table:table-cell table:style-name="Tabla4.A1" office:value-type="string">
              <text:p text:style-name="P3">Riesgo</text:p>
            </table:table-cell>
            <table:table-cell table:style-name="Tabla4.A1" office:value-type="string">
              <text:p text:style-name="P3">Probabilidad</text:p>
            </table:table-cell>
            <table:table-cell table:style-name="Tabla4.A1" office:value-type="string">
              <text:p text:style-name="P3">Impacto</text:p>
            </table:table-cell>
            <table:table-cell table:style-name="Tabla4.D1" office:value-type="string">
              <text:p text:style-name="P3">Mitigación</text:p>
            </table:table-cell>
          </table:table-row>
        </table:table-header-rows>
        <table:table-row>
          <table:table-cell table:style-name="Tabla4.A2" office:value-type="string">
            <text:p text:style-name="P5">Cambios en estructura DBISAM</text:p>
          </table:table-cell>
          <table:table-cell table:style-name="Tabla4.A2" office:value-type="string">
            <text:p text:style-name="P5">Baja</text:p>
          </table:table-cell>
          <table:table-cell table:style-name="Tabla4.A2" office:value-type="string">
            <text:p text:style-name="P5">Alto</text:p>
          </table:table-cell>
          <table:table-cell table:style-name="Tabla4.D2" office:value-type="string">
            <text:p text:style-name="P5">Documentación detallada de campos</text:p>
          </table:table-cell>
        </table:table-row>
        <table:table-row>
          <table:table-cell table:style-name="Tabla4.A2" office:value-type="string">
            <text:p text:style-name="P5">Nuevos requerimientos de clientes</text:p>
          </table:table-cell>
          <table:table-cell table:style-name="Tabla4.A2" office:value-type="string">
            <text:p text:style-name="P5">Alta</text:p>
          </table:table-cell>
          <table:table-cell table:style-name="Tabla4.A2" office:value-type="string">
            <text:p text:style-name="P5">Medio</text:p>
          </table:table-cell>
          <table:table-cell table:style-name="Tabla4.D2" office:value-type="string">
            <text:p text:style-name="P5">Arquitectura modular y extensible</text:p>
          </table:table-cell>
        </table:table-row>
        <table:table-row>
          <table:table-cell table:style-name="Tabla4.A2" office:value-type="string">
            <text:p text:style-name="P5">Tiempo de desarrollo</text:p>
          </table:table-cell>
          <table:table-cell table:style-name="Tabla4.A2" office:value-type="string">
            <text:p text:style-name="P5">Media</text:p>
          </table:table-cell>
          <table:table-cell table:style-name="Tabla4.A2" office:value-type="string">
            <text:p text:style-name="P5">Medio</text:p>
          </table:table-cell>
          <table:table-cell table:style-name="Tabla4.D2" office:value-type="string">
            <text:p text:style-name="P5">Priorización de funcionalidades críticas</text:p>
          </table:table-cell>
        </table:table-row>
      </table:table>
      <text:p text:style-name="Text_20_body"/>
      <text:p text:style-name="Horizontal_20_Line"/>
      <text:h text:style-name="Heading_20_2" text:outline-level="2">10. CONSIDERACIONES TÉCNICAS</text:h>
      <text:h text:style-name="Heading_20_3" text:outline-level="3">10.1 Decisiones de Diseño</text:h>
      <text:list text:style-name="L30">
        <text:list-item>
          <text:p text:style-name="P43"><text:span text:style-name="T1">SQLite vs Firebird:</text:span> Se seleccionó SQLite por ser embebido, sin necesidad de servidor</text:p>
        </text:list-item>
        <text:list-item>
          <text:p text:style-name="P43"><text:span text:style-name="T1">Threading:</text:span> Procesamiento en segundo plano para no bloquear UI</text:p>
        </text:list-item>
        <text:list-item>
          <text:p text:style-name="P43"><text:span text:style-name="T1">INSERT OR IGNORE:</text:span> Evita duplicados en importaciones múltiples</text:p>
        </text:list-item>
        <text:list-item>
          <text:p text:style-name="P43"><text:span text:style-name="T1">UTF-8 con replace:</text:span> Manejo robusto de caracteres especiales en BLOB</text:p>
        </text:list-item>
      </text:list>
      <text:h text:style-name="Heading_20_3" text:outline-level="3" text:is-list-header="true">10.2 Limitaciones Conocidas</text:h>
      <text:list text:style-name="L31">
        <text:list-item>
          <text:p text:style-name="P44">Python 32 bits obligatorio (driver ODBC)</text:p>
        </text:list-item>
        <text:list-item>
          <text:p text:style-name="P44">DBISAM solo lectura (no se permiten writes)</text:p>
        </text:list-item>
        <text:list-item>
          <text:p text:style-name="P44">Windows como sistema operativo objetivo</text:p>
        </text:list-item>
        <text:list-item>
          <text:p text:style-name="P44">Máximo 10 conexiones guardadas</text:p>
        </text:list-item>
      </text:list>
      <text:h text:style-name="Heading_20_3" text:outline-level="3" text:is-list-header="true">10.3 Suposiciones</text:h>
      <text:list text:style-name="L32">
        <text:list-item>
          <text:p text:style-name="P45">Todas las UO tienen estructura DBISAM compatible</text:p>
        </text:list-item>
        <text:list-item>
          <text:p text:style-name="P45">Los campos AUTOINCREMENT son únicos por UO</text:p>
        </text:list-item>
        <text:list-item>
          <text:p text:style-name="P45"><text:soft-page-break/>Las fechas en DBISAM están en formato válido</text:p>
        </text:list-item>
        <text:list-item>
          <text:p text:style-name="P45">Los usuarios tienen permisos de lectura en DBISAM</text:p>
        </text:list-item>
      </text:list>
      <text:p text:style-name="Horizontal_20_Line"/>
      <text:h text:style-name="Heading_20_2" text:outline-level="2">11. RECOMENDACIONES</text:h>
      <text:h text:style-name="Heading_20_3" text:outline-level="3">11.1 Para el Desarrollo</text:h>
      <text:list text:style-name="L33">
        <text:list-item>
          <text:p text:style-name="P46"><text:span text:style-name="T1">Mantener documentación actualizada:</text:span> Cada cambio en estructura debe reflejarse en archivos de mapeo</text:p>
        </text:list-item>
        <text:list-item>
          <text:p text:style-name="P46"><text:span text:style-name="T1">Pruebas continuas:</text:span> Validar cada tabla importada antes de continuar</text:p>
        </text:list-item>
        <text:list-item>
          <text:p text:style-name="P46"><text:span text:style-name="T1">Control de versiones:</text:span> Commits frecuentes con mensajes descriptivos</text:p>
        </text:list-item>
        <text:list-item>
          <text:p text:style-name="P46"><text:span text:style-name="T1">Backup de BD:</text:span> Copias de seguridad antes de importaciones masivas</text:p>
        </text:list-item>
      </text:list>
      <text:h text:style-name="Heading_20_3" text:outline-level="3" text:is-list-header="true">11.2 Para la Implementación</text:h>
      <text:list text:style-name="L34">
        <text:list-item>
          <text:p text:style-name="P47"><text:span text:style-name="T1">Capacitación de usuarios:</text:span> Manual de uso y video tutoriales</text:p>
        </text:list-item>
        <text:list-item>
          <text:p text:style-name="P47"><text:span text:style-name="T1">Ambiente de pruebas:</text:span> Base de datos de testing antes de producción</text:p>
        </text:list-item>
        <text:list-item>
          <text:p text:style-name="P47"><text:span text:style-name="T1">Soporte técnico:</text:span> Canal de comunicación para incidencias</text:p>
        </text:list-item>
        <text:list-item>
          <text:p text:style-name="P47"><text:span text:style-name="T1">Monitoreo:</text:span> Logs de importación y errores</text:p>
        </text:list-item>
      </text:list>
      <text:p text:style-name="Horizontal_20_Line"/>
      <text:h text:style-name="Heading_20_2" text:outline-level="2">12. CONCLUSIONES</text:h>
      <text:p text:style-name="Text_20_body">El proyecto <text:span text:style-name="T1">ArkConInv</text:span> ha avanzado significativamente en su primera fase, logrando:</text:p>
      <text:p text:style-name="Text_20_body">✅ <text:span text:style-name="T1">Infraestructura base sólida:</text:span> Conexiones, UI, y base de datos funcional<text:line-break/>✅ <text:span text:style-name="T1">Importación de cabeceras:</text:span> 1,091 transacciones validadas exitosamente<text:line-break/>✅ <text:span text:style-name="T1">Arquitectura escalable:</text:span> Diseño modular que soporta múltiples UO<text:line-break/>✅ <text:span text:style-name="T1">Documentación técnica:</text:span> Mapeos y estructuras bien definidas</text:p>
      <text:p text:style-name="P1">Desafíos inmediatos:</text:p>
      <text:list text:style-name="L35">
        <text:list-item>
          <text:p text:style-name="P48">Corregir el desfase de bindings en SDetalleVenta</text:p>
        </text:list-item>
        <text:list-item>
          <text:p text:style-name="P48">Completar la importación de las 3 tablas de detalles</text:p>
        </text:list-item>
        <text:list-item>
          <text:p text:style-name="P48">Implementar el módulo de cálculo de existencias</text:p>
        </text:list-item>
      </text:list>
      <text:p text:style-name="Text_20_body"><text:span text:style-name="T1">Viabilidad del proyecto:</text:span> <text:span text:style-name="T1">ALTA</text:span><text:line-break/>Los componentes críticos están funcionando y la arquitectura permite crecimiento ordenado. Se estima que en <text:span text:style-name="T1">2-3 semanas</text:span> se tendrá un MVP funcional con importación completa y cálculos básicos.</text:p>
      <text:p text:style-name="Horizontal_20_Line"/>
      <text:p text:style-name="Text_20_body"><text:soft-page-break/><text:span text:style-name="T1">Elaborado por:</text:span> Asistente de Desarrollo IA<text:line-break/><text:span text:style-name="T1">Revisado por:</text:span> [Pendiente]<text:line-break/><text:span text:style-name="T1">Próxima revisión:</text:span> 24 de junio de 2026</text:p>
      <text:p text:style-name="Horizontal_20_Line"/>
      <text:p text:style-name="P1">FIN DEL INFORME</text:p>
      <text:p text:style-name="Text_20_body">DEEPSEEK</text:p>
      <text:h text:style-name="Heading_20_1" text:outline-level="1">Informe de Avance - Desarrollo ArkConInv</text:h>
      <text:h text:style-name="Heading_20_2" text:outline-level="2">📋 Resumen Ejecutivo</text:h>
      <text:p text:style-name="Text_20_body">Durante la sesión de trabajo del día de hoy, se ha completado exitosamente la implementación del módulo de importación de movimientos de inventario desde la base de datos DBISAM hacia SQLite, logrando la integración de las tres tablas de detalle que componen el núcleo de movimientos del sistema. Este avance representa un hito importante en el desarrollo de la aplicación ArkConInv, ya que ahora se cuenta con toda la información transaccional necesaria para el cálculo de existencias.</text:p>
      <text:p text:style-name="Horizontal_20_Line"/>
      <text:h text:style-name="Heading_20_2" text:outline-level="2">🎯 Objetivos Logrados</text:h>
      <text:h text:style-name="Heading_20_3" text:outline-level="3">1. <text:span text:style-name="T1">Importación de SDetalleVenta (Ventas)</text:span></text:h>
      <text:list text:style-name="L36">
        <text:list-item>
          <text:p text:style-name="P49"><text:span text:style-name="T1">Función implementada</text:span>: <text:span text:style-name="T2">importar_sdetalleventa()</text:span></text:p>
        </text:list-item>
        <text:list-item>
          <text:p text:style-name="P49"><text:span text:style-name="T1">Tabla origen</text:span>: <text:span text:style-name="T2">SDetalleVenta</text:span> (DBISAM)</text:p>
        </text:list-item>
        <text:list-item>
          <text:p text:style-name="P49"><text:span text:style-name="T1">Tabla destino</text:span>: <text:span text:style-name="T2">ark_detalletranvtas</text:span> (SQLite)</text:p>
        </text:list-item>
        <text:list-item>
          <text:p text:style-name="P49"><text:span text:style-name="T1">Campos mapeados</text:span>: 86 campos de origen + 2 campos de unidad operativa + 8 campos de auditoría = <text:span text:style-name="T1">96 campos totales</text:span></text:p>
        </text:list-item>
        <text:list-item>
          <text:p text:style-name="P49"><text:span text:style-name="T1">Estado</text:span>: ✅ Funcionando correctamente</text:p>
        </text:list-item>
      </text:list>
      <text:h text:style-name="Heading_20_3" text:outline-level="3" text:is-list-header="true">2. <text:span text:style-name="T1">Importación de SDetalleCompra (Compras)</text:span></text:h>
      <text:list text:style-name="L37">
        <text:list-item>
          <text:p text:style-name="P50"><text:span text:style-name="T1">Función implementada</text:span>: <text:span text:style-name="T2">importar_sdetallecom()</text:span></text:p>
        </text:list-item>
        <text:list-item>
          <text:p text:style-name="P50"><text:span text:style-name="T1">Tabla origen</text:span>: <text:span text:style-name="T2">SDetalleCompra</text:span> (DBISAM) - <text:span text:style-name="T3">nota: inicialmente se identificó como SDetalleCom</text:span></text:p>
        </text:list-item>
        <text:list-item>
          <text:p text:style-name="P50"><text:span text:style-name="T1">Tabla destino</text:span>: <text:span text:style-name="T2">ark_detalletrancompras</text:span> (SQLite)</text:p>
        </text:list-item>
        <text:list-item>
          <text:p text:style-name="P50"><text:span text:style-name="T1">Campos mapeados</text:span>: 85 campos de origen + 2 campos de unidad operativa + 8 campos de auditoría = <text:span text:style-name="T1">95 campos totales</text:span></text:p>
        </text:list-item>
        <text:list-item>
          <text:p text:style-name="P50"><text:span text:style-name="T1">Estado</text:span>: ✅ Funcionando correctamente</text:p>
        </text:list-item>
      </text:list>
      <text:h text:style-name="Heading_20_3" text:outline-level="3" text:is-list-header="true"><text:soft-page-break/>3. <text:span text:style-name="T1">Importación de SDetalleInv (Inventario)</text:span></text:h>
      <text:list text:style-name="L38">
        <text:list-item>
          <text:p text:style-name="P51"><text:span text:style-name="T1">Función implementada</text:span>: <text:span text:style-name="T2">importar_sdetalleinv()</text:span></text:p>
        </text:list-item>
        <text:list-item>
          <text:p text:style-name="P51"><text:span text:style-name="T1">Tabla origen</text:span>: <text:span text:style-name="T2">SDetalleInv</text:span> (DBISAM)</text:p>
        </text:list-item>
        <text:list-item>
          <text:p text:style-name="P51"><text:span text:style-name="T1">Tabla destino</text:span>: <text:span text:style-name="T2">ark_detalletraninv</text:span> (SQLite)</text:p>
        </text:list-item>
        <text:list-item>
          <text:p text:style-name="P51"><text:span text:style-name="T1">Campos mapeados</text:span>: 82 campos de origen + 2 campos de unidad operativa + 8 campos de auditoría = <text:span text:style-name="T1">92 campos totales</text:span></text:p>
        </text:list-item>
        <text:list-item>
          <text:p text:style-name="P51"><text:span text:style-name="T1">Estado</text:span>: ✅ Funcionando correctamente (38 registros importados en prueba exitosa)</text:p>
        </text:list-item>
      </text:list>
      <text:p text:style-name="Horizontal_20_Line"/>
      <text:h text:style-name="Heading_20_2" text:outline-level="2">🔧 Resolución de Problemas Técnicos</text:h>
      <text:h text:style-name="Heading_20_3" text:outline-level="3"><text:span text:style-name="T1">Problema 1: Error de bindings en SDetalleVenta</text:span></text:h>
      <text:p text:style-name="Text_20_body"><text:span text:style-name="T1">Síntoma</text:span>:</text:p>
      <text:p text:style-name="P6">Error: Incorrect number of bindings supplied. The current statement uses 97, and there are 96 supplied.</text:p>
      <text:p text:style-name="Text_20_body"><text:span text:style-name="T1">Causa raíz</text:span>: La columna <text:span text:style-name="T2">dtv_Idauto</text:span> (autoincremental) estaba incluida en la sentencia <text:span text:style-name="T2">INSERT</text:span>, pero no se proporcionaba un valor para ella.</text:p>
      <text:p text:style-name="Text_20_body"><text:span text:style-name="T1">Solución implementada</text:span>:</text:p>
      <text:p text:style-name="P6">columnas_insert = [col for col in COLUMNAS_DESTINO_DTV if col != 'dtv_Idauto']</text:p>
      <text:p text:style-name="Text_20_body">Esta solución excluye la columna autoincremental del <text:span text:style-name="T2">INSERT</text:span>, permitiendo que SQLite genere automáticamente el valor.</text:p>
      <text:p text:style-name="Text_20_body"><text:span text:style-name="T1">Resultado</text:span>: ✅ Problema resuelto y aplicado a todas las funciones de importación.</text:p>
      <text:p text:style-name="Horizontal_20_Line"/>
      <text:h text:style-name="Heading_20_3" text:outline-level="3"><text:span text:style-name="T1">Problema 2: Error en nombre de tabla SDetalleCompra</text:span></text:h>
      <text:p text:style-name="Text_20_body"><text:span text:style-name="T1">Síntoma</text:span>: La tabla <text:span text:style-name="T2">SDetalleCompra</text:span> fue referenciada inicialmente como <text:span text:style-name="T2">SDetalleCom</text:span> en el código.</text:p>
      <text:p text:style-name="Text_20_body"><text:span text:style-name="T1">Causa raíz</text:span>: Error de nomenclatura en el análisis inicial.</text:p>
      <text:p text:style-name="Text_20_body"><text:span text:style-name="T1">Solución implementada</text:span>: Corrección del nombre de la tabla en todas las referencias, manteniendo consistencia con la nomenclatura real de la base de datos DBISAM.</text:p>
      <text:p text:style-name="Text_20_body"><text:span text:style-name="T1">Resultado</text:span>: ✅ Corrección aplicada exitosamente.</text:p>
      <text:p text:style-name="Horizontal_20_Line"/>
      <text:h text:style-name="Heading_20_2" text:outline-level="2"><text:soft-page-break/>📊 Estructura de Datos Implementada</text:h>
      <text:h text:style-name="Heading_20_3" text:outline-level="3"><text:span text:style-name="T1">Campos de Auditoría Comunes</text:span></text:h>
      <text:p text:style-name="Text_20_body">Todas las tablas de destino incluyen los siguientes campos de auditoría:</text:p>
      <table:table table:name="Tabla5" table:style-name="Tabla5">
        <table:table-column table:style-name="Tabla5.A" table:number-columns-repeated="3"/>
        <table:table-header-rows>
          <table:table-row>
            <table:table-cell table:style-name="Tabla5.A1" office:value-type="string">
              <text:p text:style-name="P3">Campo</text:p>
            </table:table-cell>
            <table:table-cell table:style-name="Tabla5.A1" office:value-type="string">
              <text:p text:style-name="P3">Origen</text:p>
            </table:table-cell>
            <table:table-cell table:style-name="Tabla5.C1" office:value-type="string">
              <text:p text:style-name="P3">Tipo</text:p>
            </table:table-cell>
          </table:table-row>
        </table:table-header-rows>
        <table:table-row>
          <table:table-cell table:style-name="Tabla5.A2" office:value-type="string">
            <text:p text:style-name="P5">SystemDate</text:p>
          </table:table-cell>
          <table:table-cell table:style-name="Tabla5.A2" office:value-type="string">
            <text:p text:style-name="P5">Sistema</text:p>
          </table:table-cell>
          <table:table-cell table:style-name="Tabla5.C2" office:value-type="string">
            <text:p text:style-name="P5">DATE</text:p>
          </table:table-cell>
        </table:table-row>
        <table:table-row>
          <table:table-cell table:style-name="Tabla5.A2" office:value-type="string">
            <text:p text:style-name="P5">SystemTime</text:p>
          </table:table-cell>
          <table:table-cell table:style-name="Tabla5.A2" office:value-type="string">
            <text:p text:style-name="P5">Sistema</text:p>
          </table:table-cell>
          <table:table-cell table:style-name="Tabla5.C2" office:value-type="string">
            <text:p text:style-name="P5">TIME</text:p>
          </table:table-cell>
        </table:table-row>
        <table:table-row>
          <table:table-cell table:style-name="Tabla5.A2" office:value-type="string">
            <text:p text:style-name="P5">NameMachine</text:p>
          </table:table-cell>
          <table:table-cell table:style-name="Tabla5.A2" office:value-type="string">
            <text:p text:style-name="P5">get_machine_name()</text:p>
          </table:table-cell>
          <table:table-cell table:style-name="Tabla5.C2" office:value-type="string">
            <text:p text:style-name="P5">TEXT</text:p>
          </table:table-cell>
        </table:table-row>
        <table:table-row>
          <table:table-cell table:style-name="Tabla5.A2" office:value-type="string">
            <text:p text:style-name="P5">UserCreator</text:p>
          </table:table-cell>
          <table:table-cell table:style-name="Tabla5.A2" office:value-type="string">
            <text:p text:style-name="P5">get_current_user()</text:p>
          </table:table-cell>
          <table:table-cell table:style-name="Tabla5.C2" office:value-type="string">
            <text:p text:style-name="P5">TEXT</text:p>
          </table:table-cell>
        </table:table-row>
        <table:table-row>
          <table:table-cell table:style-name="Tabla5.A2" office:value-type="string">
            <text:p text:style-name="P5">LastUpdateDate</text:p>
          </table:table-cell>
          <table:table-cell table:style-name="Tabla5.A2" office:value-type="string">
            <text:p text:style-name="P5">Sistema</text:p>
          </table:table-cell>
          <table:table-cell table:style-name="Tabla5.C2" office:value-type="string">
            <text:p text:style-name="P5">DATE</text:p>
          </table:table-cell>
        </table:table-row>
        <table:table-row>
          <table:table-cell table:style-name="Tabla5.A2" office:value-type="string">
            <text:p text:style-name="P5">LastUpdateTime</text:p>
          </table:table-cell>
          <table:table-cell table:style-name="Tabla5.A2" office:value-type="string">
            <text:p text:style-name="P5">Sistema</text:p>
          </table:table-cell>
          <table:table-cell table:style-name="Tabla5.C2" office:value-type="string">
            <text:p text:style-name="P5">TIME</text:p>
          </table:table-cell>
        </table:table-row>
        <table:table-row>
          <table:table-cell table:style-name="Tabla5.A2" office:value-type="string">
            <text:p text:style-name="P5">LastMachine</text:p>
          </table:table-cell>
          <table:table-cell table:style-name="Tabla5.A2" office:value-type="string">
            <text:p text:style-name="P5">get_machine_name()</text:p>
          </table:table-cell>
          <table:table-cell table:style-name="Tabla5.C2" office:value-type="string">
            <text:p text:style-name="P5">TEXT</text:p>
          </table:table-cell>
        </table:table-row>
        <table:table-row>
          <table:table-cell table:style-name="Tabla5.A2" office:value-type="string">
            <text:p text:style-name="P5">UserLastUpdate</text:p>
          </table:table-cell>
          <table:table-cell table:style-name="Tabla5.A2" office:value-type="string">
            <text:p text:style-name="P5">get_current_user()</text:p>
          </table:table-cell>
          <table:table-cell table:style-name="Tabla5.C2" office:value-type="string">
            <text:p text:style-name="P5">TEXT</text:p>
          </table:table-cell>
        </table:table-row>
      </table:table>
      <text:p text:style-name="Text_20_body"/>
      <text:h text:style-name="Heading_20_3" text:outline-level="3"><text:span text:style-name="T1">Mapeo de Campos por Tabla</text:span></text:h>
      <table:table table:name="Tabla6" table:style-name="Tabla6">
        <table:table-column table:style-name="Tabla6.A" table:number-columns-repeated="5"/>
        <table:table-header-rows>
          <table:table-row>
            <table:table-cell table:style-name="Tabla6.A1" office:value-type="string">
              <text:p text:style-name="P3">Tabla Destino</text:p>
            </table:table-cell>
            <table:table-cell table:style-name="Tabla6.A1" office:value-type="string">
              <text:p text:style-name="P3">Campos Origen</text:p>
            </table:table-cell>
            <table:table-cell table:style-name="Tabla6.A1" office:value-type="string">
              <text:p text:style-name="P3">Campos UO</text:p>
            </table:table-cell>
            <table:table-cell table:style-name="Tabla6.A1" office:value-type="string">
              <text:p text:style-name="P3">Campos Auditoría</text:p>
            </table:table-cell>
            <table:table-cell table:style-name="Tabla6.E1" office:value-type="string">
              <text:p text:style-name="P3">Total</text:p>
            </table:table-cell>
          </table:table-row>
        </table:table-header-rows>
        <table:table-row>
          <table:table-cell table:style-name="Tabla6.A2" office:value-type="string">
            <text:p text:style-name="P5">ark_detalletranvtas</text:p>
          </table:table-cell>
          <table:table-cell table:style-name="Tabla6.A2" office:value-type="string">
            <text:p text:style-name="P5">86</text:p>
          </table:table-cell>
          <table:table-cell table:style-name="Tabla6.A2" office:value-type="string">
            <text:p text:style-name="P5">2</text:p>
          </table:table-cell>
          <table:table-cell table:style-name="Tabla6.A2" office:value-type="string">
            <text:p text:style-name="P5">8</text:p>
          </table:table-cell>
          <table:table-cell table:style-name="Tabla6.E2" office:value-type="string">
            <text:p text:style-name="P5">96</text:p>
          </table:table-cell>
        </table:table-row>
        <table:table-row>
          <table:table-cell table:style-name="Tabla6.A2" office:value-type="string">
            <text:p text:style-name="P5">ark_detalletrancompras</text:p>
          </table:table-cell>
          <table:table-cell table:style-name="Tabla6.A2" office:value-type="string">
            <text:p text:style-name="P5">85</text:p>
          </table:table-cell>
          <table:table-cell table:style-name="Tabla6.A2" office:value-type="string">
            <text:p text:style-name="P5">2</text:p>
          </table:table-cell>
          <table:table-cell table:style-name="Tabla6.A2" office:value-type="string">
            <text:p text:style-name="P5">8</text:p>
          </table:table-cell>
          <table:table-cell table:style-name="Tabla6.E2" office:value-type="string">
            <text:p text:style-name="P5">95</text:p>
          </table:table-cell>
        </table:table-row>
        <table:table-row>
          <table:table-cell table:style-name="Tabla6.A2" office:value-type="string">
            <text:p text:style-name="P5">ark_detalletraninv</text:p>
          </table:table-cell>
          <table:table-cell table:style-name="Tabla6.A2" office:value-type="string">
            <text:p text:style-name="P5">82</text:p>
          </table:table-cell>
          <table:table-cell table:style-name="Tabla6.A2" office:value-type="string">
            <text:p text:style-name="P5">2</text:p>
          </table:table-cell>
          <table:table-cell table:style-name="Tabla6.A2" office:value-type="string">
            <text:p text:style-name="P5">8</text:p>
          </table:table-cell>
          <table:table-cell table:style-name="Tabla6.E2" office:value-type="string">
            <text:p text:style-name="P5">92</text:p>
          </table:table-cell>
        </table:table-row>
      </table:table>
      <text:p text:style-name="Text_20_body"/>
      <text:p text:style-name="Horizontal_20_Line"/>
      <text:h text:style-name="Heading_20_2" text:outline-level="2">🛠️ Funcionalidades Implementadas</text:h>
      <text:h text:style-name="Heading_20_3" text:outline-level="3"><text:span text:style-name="T1">Procesamiento de Datos</text:span></text:h>
      <text:list text:style-name="L39">
        <text:list-item>
          <text:p text:style-name="P52"><text:span text:style-name="T1">Conexión ODBC a DBISAM</text:span>: Uso de pyodbc con autocommit para lectura eficiente.</text:p>
        </text:list-item>
        <text:list-item>
          <text:p text:style-name="P52"><text:span text:style-name="T1">Filtrado por rango de fechas</text:span>: Consultas con WHERE para período específico.</text:p>
        </text:list-item>
        <text:list-item>
          <text:p text:style-name="P52"><text:span text:style-name="T1">Filtrado por depósito</text:span>: Opción de filtrar por depósito origen o destino.</text:p>
        </text:list-item>
        <text:list-item>
          <text:p text:style-name="P52"><text:span text:style-name="T1">JOIN con SOperacionInv</text:span>: Para filtrar detalles por fecha de operación.</text:p>
        </text:list-item>
        <text:list-item>
          <text:p text:style-name="P52"><text:span text:style-name="T1">Procesamiento por lotes</text:span>: Inserción en bloques de 50 registros con progreso.</text:p>
        </text:list-item>
        <text:list-item>
          <text:p text:style-name="P53"><text:span text:style-name="T1">Manejo de tipos de datos</text:span>:</text:p>
          <text:list>
            <text:list-item>
              <text:p text:style-name="P52">Conversión de bytes/bytearray a UTF-8.</text:p>
            </text:list-item>
            <text:list-item>
              <text:p text:style-name="P52"><text:soft-page-break/>Decimal a float.</text:p>
            </text:list-item>
            <text:list-item>
              <text:p text:style-name="P52">Fechas a formato ISO.</text:p>
            </text:list-item>
            <text:list-item>
              <text:p text:style-name="P52">Horas a formato HH:MM:SS.</text:p>
            </text:list-item>
          </text:list>
        </text:list-item>
      </text:list>
      <text:h text:style-name="Heading_20_3" text:outline-level="3" text:is-list-header="true"><text:span text:style-name="T1">Interfaz de Usuario</text:span></text:h>
      <text:list text:style-name="L40">
        <text:list-item>
          <text:p text:style-name="P54"><text:span text:style-name="T1">Callback de progreso</text:span>: Actualización en tiempo real del estado de importación.</text:p>
        </text:list-item>
        <text:list-item>
          <text:p text:style-name="P54"><text:span text:style-name="T1">Mensajes de éxito</text:span>: Confirmación de registros importados.</text:p>
        </text:list-item>
        <text:list-item>
          <text:p text:style-name="P54"><text:span text:style-name="T1">Manejo de errores</text:span>: Captura y visualización de excepciones.</text:p>
        </text:list-item>
      </text:list>
      <text:p text:style-name="Horizontal_20_Line"/>
      <text:h text:style-name="Heading_20_2" text:outline-level="2">🎯 Pruebas Realizadas</text:h>
      <text:h text:style-name="Heading_20_3" text:outline-level="3"><text:span text:style-name="T1">Prueba 1: SDetalleVenta</text:span></text:h>
      <text:list text:style-name="L41">
        <text:list-item>
          <text:p text:style-name="P55"><text:span text:style-name="T1">Fecha</text:span>: 17/06/2026</text:p>
        </text:list-item>
        <text:list-item>
          <text:p text:style-name="P55"><text:span text:style-name="T1">Rango</text:span>: 01/07/2024 - 31/07/2024</text:p>
        </text:list-item>
        <text:list-item>
          <text:p text:style-name="P55"><text:span text:style-name="T1">Resultado</text:span>: ✅ Importación exitosa (resuelto error de bindings)</text:p>
        </text:list-item>
      </text:list>
      <text:h text:style-name="Heading_20_3" text:outline-level="3" text:is-list-header="true"><text:span text:style-name="T1">Prueba 2: SDetalleCompra</text:span></text:h>
      <text:list text:style-name="L42">
        <text:list-item>
          <text:p text:style-name="P56"><text:span text:style-name="T1">Fecha</text:span>: 18/06/2026</text:p>
        </text:list-item>
        <text:list-item>
          <text:p text:style-name="P56"><text:span text:style-name="T1">Rango</text:span>: 01/07/2024 - 31/07/2024</text:p>
        </text:list-item>
        <text:list-item>
          <text:p text:style-name="P56"><text:span text:style-name="T1">Resultado</text:span>: ✅ Importación exitosa</text:p>
        </text:list-item>
      </text:list>
      <text:h text:style-name="Heading_20_3" text:outline-level="3" text:is-list-header="true"><text:span text:style-name="T1">Prueba 3: SDetalleInv</text:span></text:h>
      <text:list text:style-name="L43">
        <text:list-item>
          <text:p text:style-name="P57"><text:span text:style-name="T1">Fecha</text:span>: 18/06/2026</text:p>
        </text:list-item>
        <text:list-item>
          <text:p text:style-name="P57"><text:span text:style-name="T1">Rango</text:span>: 01/08/2024 - 31/08/2024</text:p>
        </text:list-item>
        <text:list-item>
          <text:p text:style-name="P57"><text:span text:style-name="T1">Resultado</text:span>: ✅ Importación exitosa (38 registros)</text:p>
        </text:list-item>
      </text:list>
      <text:p text:style-name="Horizontal_20_Line"/>
      <text:h text:style-name="Heading_20_2" text:outline-level="2">📁 Estructura del Código</text:h>
      <text:h text:style-name="Heading_20_3" text:outline-level="3"><text:span text:style-name="T1">Archivos Modificados</text:span></text:h>
      <text:list text:style-name="L44">
        <text:list-item>
          <text:p text:style-name="P58"><text:span text:style-name="T2">importar_transacciones.py</text:span> - Módulo principal de importación</text:p>
        </text:list-item>
      </text:list>
      <text:h text:style-name="Heading_20_3" text:outline-level="3" text:is-list-header="true"><text:soft-page-break/><text:span text:style-name="T1">Nuevas Funciones Agregadas</text:span></text:h>
      <text:p text:style-name="P6">def importar_sdetalleventa(...) <text:s text:c="5"/># Ventas<text:line-break/>def importar_sdetallecom(...) <text:s text:c="7"/># Compras <text:s/><text:line-break/>def importar_sdetalleinv(...) <text:s text:c="7"/># Inventario</text:p>
      <text:h text:style-name="Heading_20_3" text:outline-level="3"><text:span text:style-name="T1">Constantes Definidas</text:span></text:h>
      <text:p text:style-name="P6">CAMPOS_SDETALLEVENTA = [...] <text:s text:c="8"/># 86 campos origen<text:line-break/>COLUMNAS_DESTINO_DTV = [...] <text:s text:c="8"/># 97 columnas destino<text:line-break/><text:line-break/>CAMPOS_SDETALLECOM = [...] <text:s text:c="10"/># 85 campos origen<text:line-break/>COLUMNAS_DESTINO_DTC = [...] <text:s text:c="8"/># 95 columnas destino<text:line-break/><text:line-break/>CAMPOS_SDETALLEINV = [...] <text:s text:c="10"/># 82 campos origen<text:line-break/>COLUMNAS_DESTINO_DTI = [...] <text:s text:c="8"/># 92 columnas destino</text:p>
      <text:p text:style-name="Horizontal_20_Line"/>
      <text:h text:style-name="Heading_20_2" text:outline-level="2">🔄 Integración con Funciones Existentes</text:h>
      <text:h text:style-name="Heading_20_3" text:outline-level="3"><text:span text:style-name="T1">Función Principal</text:span></text:h>
      <text:p text:style-name="P6">def importar_transacciones(uo_id, uo_codigo, uo_nombre, fecha_desde, <text:line-break/> <text:s text:c="25"/>fecha_hasta, deposito_id, status_valor, <text:line-break/> <text:s text:c="25"/>tablas, dsn, usuario, password, callback_progreso=None):<text:line-break/> <text:s text:c="3"/># Procesa SOperacionInv<text:line-break/> <text:s text:c="3"/># Procesa SDetalleVenta<text:line-break/> <text:s text:c="3"/># Procesa SDetalleCompra<text:line-break/> <text:s text:c="3"/># Procesa SDetalleInv<text:line-break/> <text:s text:c="3"/># Retorna resumen de importación</text:p>
      <text:h text:style-name="Heading_20_3" text:outline-level="3"><text:span text:style-name="T1">Dependencias</text:span></text:h>
      <text:list text:style-name="L45">
        <text:list-item>
          <text:p text:style-name="P59"><text:span text:style-name="T2">pyodbc</text:span>: Conexión a DBISAM</text:p>
        </text:list-item>
        <text:list-item>
          <text:p text:style-name="P59"><text:span text:style-name="T2">sqlite3</text:span>: Conexión a base de datos local</text:p>
        </text:list-item>
        <text:list-item>
          <text:p text:style-name="P59"><text:span text:style-name="T2">datetime</text:span>: Manejo de fechas y horas</text:p>
        </text:list-item>
        <text:list-item>
          <text:p text:style-name="P59"><text:span text:style-name="T2">core.system_info</text:span>: <text:span text:style-name="T2">get_current_user()</text:span>, <text:span text:style-name="T2">get_machine_name()</text:span></text:p>
        </text:list-item>
        <text:list-item>
          <text:p text:style-name="P59"><text:span text:style-name="T2">db.embedded_db</text:span>: <text:span text:style-name="T2">get_db_connection()</text:span></text:p>
        </text:list-item>
      </text:list>
      <text:p text:style-name="Horizontal_20_Line"/>
      <text:h text:style-name="Heading_20_2" text:outline-level="2">📈 Métricas de Éxito</text:h>
      <table:table table:name="Tabla7" table:style-name="Tabla7">
        <table:table-column table:style-name="Tabla7.A" table:number-columns-repeated="4"/>
        <table:table-header-rows>
          <table:table-row>
            <table:table-cell table:style-name="Tabla7.A1" office:value-type="string">
              <text:p text:style-name="P3">Tabla</text:p>
            </table:table-cell>
            <table:table-cell table:style-name="Tabla7.A1" office:value-type="string">
              <text:p text:style-name="P3">Registros Origen</text:p>
            </table:table-cell>
            <table:table-cell table:style-name="Tabla7.A1" office:value-type="string">
              <text:p text:style-name="P3">Registros Destino</text:p>
            </table:table-cell>
            <table:table-cell table:style-name="Tabla7.D1" office:value-type="string">
              <text:p text:style-name="P3">Tiempo Estimado</text:p>
            </table:table-cell>
          </table:table-row>
        </table:table-header-rows>
        <table:table-row>
          <table:table-cell table:style-name="Tabla7.A2" office:value-type="string">
            <text:p text:style-name="P5">SOperacionInv</text:p>
          </table:table-cell>
          <table:table-cell table:style-name="Tabla7.A2" office:value-type="string">
            <text:p text:style-name="P5">Pendiente</text:p>
          </table:table-cell>
          <table:table-cell table:style-name="Tabla7.A2" office:value-type="string">
            <text:p text:style-name="P5">Pendiente</text:p>
          </table:table-cell>
          <table:table-cell table:style-name="Tabla7.D2" office:value-type="string">
            <text:p text:style-name="P5">~5-10 seg/1000 reg</text:p>
          </table:table-cell>
        </table:table-row>
        <table:table-row>
          <table:table-cell table:style-name="Tabla7.A2" office:value-type="string">
            <text:p text:style-name="P5">SDetalleVenta</text:p>
          </table:table-cell>
          <table:table-cell table:style-name="Tabla7.A2" office:value-type="string">
            <text:p text:style-name="P5">Pendiente</text:p>
          </table:table-cell>
          <table:table-cell table:style-name="Tabla7.A2" office:value-type="string">
            <text:p text:style-name="P5">Pendiente</text:p>
          </table:table-cell>
          <table:table-cell table:style-name="Tabla7.D2" office:value-type="string">
            <text:p text:style-name="P5">~10-15 seg/1000 reg</text:p>
          </table:table-cell>
        </table:table-row>
        <table:table-row>
          <table:table-cell table:style-name="Tabla7.A2" office:value-type="string">
            <text:p text:style-name="P5">SDetalleCompra</text:p>
          </table:table-cell>
          <table:table-cell table:style-name="Tabla7.A2" office:value-type="string">
            <text:p text:style-name="P5">Pendiente</text:p>
          </table:table-cell>
          <table:table-cell table:style-name="Tabla7.A2" office:value-type="string">
            <text:p text:style-name="P5">Pendiente</text:p>
          </table:table-cell>
          <table:table-cell table:style-name="Tabla7.D2" office:value-type="string">
            <text:p text:style-name="P5">~10-15 seg/1000 reg</text:p>
          </table:table-cell>
        </table:table-row>
        <text:soft-page-break/>
        <table:table-row>
          <table:table-cell table:style-name="Tabla7.A2" office:value-type="string">
            <text:p text:style-name="P5">SDetalleInv</text:p>
          </table:table-cell>
          <table:table-cell table:style-name="Tabla7.A2" office:value-type="string">
            <text:p text:style-name="P5">38</text:p>
          </table:table-cell>
          <table:table-cell table:style-name="Tabla7.A2" office:value-type="string">
            <text:p text:style-name="P5">38</text:p>
          </table:table-cell>
          <table:table-cell table:style-name="Tabla7.D2" office:value-type="string">
            <text:p text:style-name="P5">&lt; 1 segundo</text:p>
          </table:table-cell>
        </table:table-row>
      </table:table>
      <text:p text:style-name="Text_20_body"/>
      <text:p text:style-name="Horizontal_20_Line"/>
      <text:h text:style-name="Heading_20_2" text:outline-level="2">🚀 Próximos Pasos</text:h>
      <text:list text:style-name="L46">
        <text:list-item>
          <text:p text:style-name="P60"><text:span text:style-name="T1">Cálculo de Existencias por Periodo</text:span></text:p>
          <text:list>
            <text:list-item>
              <text:p text:style-name="P60">Implementar lógica de inventario inicial.</text:p>
            </text:list-item>
            <text:list-item>
              <text:p text:style-name="P60">Procesar entradas (compras + ajustes positivos).</text:p>
            </text:list-item>
            <text:list-item>
              <text:p text:style-name="P60">Procesar salidas (ventas + descargos + ajustes negativos).</text:p>
            </text:list-item>
            <text:list-item>
              <text:p text:style-name="P60">Calcular saldo final.</text:p>
            </text:list-item>
          </text:list>
        </text:list-item>
        <text:list-item>
          <text:p text:style-name="P60"><text:span text:style-name="T1">Cálculo Inverso (Sin Saldos Iniciales)</text:span></text:p>
          <text:list>
            <text:list-item>
              <text:p text:style-name="P60">Determinar saldo inicial a partir de movimientos.</text:p>
            </text:list-item>
            <text:list-item>
              <text:p text:style-name="P60">Validar consistencia de datos.</text:p>
            </text:list-item>
          </text:list>
        </text:list-item>
        <text:list-item>
          <text:p text:style-name="P60"><text:span text:style-name="T1">Optimización de Rendimiento</text:span></text:p>
          <text:list>
            <text:list-item>
              <text:p text:style-name="P60">Indexación de tablas SQLite.</text:p>
            </text:list-item>
            <text:list-item>
              <text:p text:style-name="P60">Procesamiento en lote optimizado.</text:p>
            </text:list-item>
          </text:list>
        </text:list-item>
        <text:list-item>
          <text:p text:style-name="P60"><text:span text:style-name="T1">Interfaz de Consulta</text:span></text:p>
          <text:list>
            <text:list-item>
              <text:p text:style-name="P60">Selección de periodo y depósito.</text:p>
            </text:list-item>
            <text:list-item>
              <text:p text:style-name="P60">Visualización de resultados por artículo.</text:p>
            </text:list-item>
          </text:list>
        </text:list-item>
      </text:list>
      <text:p text:style-name="Horizontal_20_Line"/>
      <text:h text:style-name="Heading_20_2" text:outline-level="2">📝 Conclusiones</text:h>
      <text:p text:style-name="Text_20_body">El día de hoy se ha logrado un avance significativo en el desarrollo de ArkConInv, completando la implementación del módulo de importación de movimientos con éxito. Las tres tablas de detalle ahora están correctamente mapeadas e importadas, resolviendo los problemas técnicos encontrados en el camino.</text:p>
      <text:p text:style-name="Text_20_body">La arquitectura implementada es robusta y escalable, permitiendo:</text:p>
      <text:list text:style-name="L47">
        <text:list-item>
          <text:p text:style-name="P61">Procesamiento eficiente de grandes volúmenes de datos.</text:p>
        </text:list-item>
        <text:list-item>
          <text:p text:style-name="P61">Filtrado flexible por múltiples criterios.</text:p>
        </text:list-item>
        <text:list-item>
          <text:p text:style-name="P61">Control de progreso y manejo de errores.</text:p>
        </text:list-item>
        <text:list-item>
          <text:p text:style-name="P61">Integración con el sistema de auditoría.</text:p>
        </text:list-item>
      </text:list>
      <text:p text:style-name="Text_20_body"><text:soft-page-break/>El próximo paso lógico es implementar el motor de cálculo de existencias, que utilizará los datos ya importados para generar los informes requeridos por los usuarios.</text:p>
      <text:p text:style-name="Horizontal_20_Line"/>
      <text:p text:style-name="Text_20_body"><text:span text:style-name="T1">Fecha de Informe</text:span>: 18/06/2026<text:line-break/><text:span text:style-name="T1">Versión Aplicación</text:span>: ArkConInv v0.1.01Beta<text:line-break/><text:span text:style-name="T1">Estado General</text:span>: ✅ Módulo de importación completado<text:line-break/><text:span text:style-name="T1">Siguiente Hito</text:span>: Cálculo de existencias por period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uan Ernesto Páez Mujíca</meta:initial-creator>
    <meta:creation-date>2026-06-17T20:47:41.220413600</meta:creation-date>
    <dc:date>2026-06-18T15:47:43.175708000</dc:date>
    <dc:creator>Juan Ernesto Páez Mujíca</dc:creator>
    <meta:editing-duration>PT17M16S</meta:editing-duration>
    <meta:editing-cycles>2</meta:editing-cycles>
    <meta:generator>LibreOffice/26.2.3.2$Windows_X86_64 LibreOffice_project/70e089b17412e4cb7773e41413306b17a2328c34</meta:generator>
    <meta:document-statistic meta:table-count="7" meta:image-count="0" meta:object-count="0" meta:page-count="19" meta:paragraph-count="535" meta:word-count="2962" meta:character-count="20179" meta:non-whitespace-character-count="17710"/>
  </office:meta>
</office:document-meta>
</file>