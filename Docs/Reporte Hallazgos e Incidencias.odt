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148f" officeooo:paragraph-rsid="0011148f"/>
    </style:style>
    <style:style style:name="P2" style:family="paragraph" style:parent-style-name="Text_20_body">
      <style:text-properties officeooo:paragraph-rsid="0011148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40190"/>
    </style:style>
    <style:style style:name="P5" style:family="paragraph" style:parent-style-name="Text_20_body">
      <style:text-properties officeooo:rsid="00140190" officeooo:paragraph-rsid="00140190"/>
    </style:style>
    <style:style style:name="P6" style:family="paragraph" style:parent-style-name="Text_20_body">
      <style:text-properties officeooo:paragraph-rsid="00140190"/>
    </style:style>
    <style:style style:name="P7" style:family="paragraph" style:parent-style-name="Text_20_body" style:list-style-name="L2">
      <style:text-properties officeooo:paragraph-rsid="00140190"/>
    </style:style>
    <style:style style:name="P8" style:family="paragraph" style:parent-style-name="Text_20_body" style:list-style-name="L2">
      <style:text-properties fo:color="#000000" loext:opacity="100%" style:font-name="Calibri" fo:font-size="11pt" officeooo:rsid="00150f01" officeooo:paragraph-rsid="00140190" style:font-size-asian="11pt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officeooo:rsid="0011148f"/>
    </style:style>
    <style:style style:name="T2" style:family="text">
      <style:text-properties officeooo:rsid="0012cb8a"/>
    </style:style>
    <style:style style:name="T3" style:family="text">
      <style:text-properties fo:font-weight="bold"/>
    </style:style>
    <style:style style:name="T4" style:family="text">
      <style:text-properties officeooo:rsid="00140190"/>
    </style:style>
    <style:style style:name="T5" style:family="text">
      <style:text-properties fo:color="#000000" loext:opacity="100%" style:font-name="Calibri" fo:font-size="11pt" officeooo:rsid="00140190" style:font-size-asian="11pt"/>
    </style:style>
    <style:style style:name="T6" style:family="text">
      <style:text-properties fo:color="#000000" loext:opacity="100%" style:font-name="Calibri" fo:font-size="11pt" officeooo:rsid="00150f01" style:font-size-asian="11pt"/>
    </style:style>
    <style:style style:name="T7" style:family="text">
      <style:text-properties officeooo:rsid="0015b550"/>
    </style:style>
    <style:style style:name="T8" style:family="text">
      <style:text-properties officeooo:rsid="001848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aci20260620001</text:span> – <text:span text:style-name="T1">Duplicidad de importación de registros</text:span></text:h>
      <text:h text:style-name="Heading_20_3" text:outline-level="3">📋 Descripción del Problema</text:h>
      <text:p text:style-name="P1">Después de varias pruebas realizadas, se detectó que al momento de realizar la importación, <text:span text:style-name="T2">si el usuario por alguna circunstancia <text:s/>repite un rango de fecha ya procesado, a aplicación simplemente vuelva a realizar la importacion duplicando la información. Y como se ha de suponer ésto es totalmente inaceptable</text:span></text:p>
      <text:p text:style-name="P1"/>
      <text:p text:style-name="P1"/>
      <text:h text:style-name="Heading_20_3" text:outline-level="3">🔍 Contexto</text:h>
      <text:p text:style-name="P2"><text:span text:style-name="T3">Módulo/Componente</text:span>: <text:span text:style-name="T2">Todos los módulos relacionados con la importación de los movimientos o transacciones de inventario Módulo importar_transaccione.</text:span></text:p>
      <text:list text:style-name="L1">
        <text:list-item>
          <text:p text:style-name="P3"><text:span text:style-name="T3">Tablas Involucradas</text:span>: </text:p>
          <text:list>
            <text:list-item>
              <text:p text:style-name="P4">ark_detalletranvtas<text:tab/><text:span text:style-name="T4">= <text:tab/></text:span><text:span text:style-name="T2">SDetalleVenta</text:span></text:p>
            </text:list-item>
            <text:list-item>
              <text:p text:style-name="P4">ark_detalletrancomp<text:tab/><text:span text:style-name="T4">= <text:tab/></text:span><text:span text:style-name="T2">SDetalleCompra</text:span></text:p>
            </text:list-item>
            <text:list-item>
              <text:p text:style-name="P4">ark_detalletraninv<text:tab/><text:span text:style-name="T4">= <text:tab/></text:span><text:span text:style-name="T2">SDetalleInv</text:span></text:p>
            </text:list-item>
            <text:list-item>
              <text:p text:style-name="P4">ark_transacciones<text:tab/><text:span text:style-name="T4">= <text:tab/></text:span><text:span text:style-name="T2">SOperacionInv</text:span></text:p>
            </text:list-item>
          </text:list>
        </text:list-item>
        <text:list-item>
          <text:p text:style-name="P3"><text:span text:style-name="T3">Escenario</text:span>: <text:span text:style-name="T4">En éste momento es el comportamiento normal de la alicacion</text:span></text:p>
        </text:list-item>
      </text:list>
      <text:h text:style-name="Heading_20_3" text:outline-level="3" text:is-list-header="true">✅ Comportamiento Esperado</text:h>
      <text:p text:style-name="P5">No se debe permitir insertar movimientos duplicados, el usuario debe recibir un mensaje de notificación que ya ése periodo fue procesado </text:p>
      <text:h text:style-name="Heading_20_3" text:outline-level="3">❌ Comportamiento Actual</text:h>
      <text:p text:style-name="P6"><text:span text:style-name="T4">Duplica, triplica y no hay notificaciones al usuario</text:span></text:p>
      <text:h text:style-name="Heading_20_3" text:outline-level="3">🛠️ Posibles Soluciones</text:h>
      <text:list text:style-name="L2">
        <text:list-item>
          <text:p text:style-name="P7"><text:span text:style-name="T5">Creación de un ID unico para cada tabla de SQLite, el cual se genera de un proceso de concatenación </text:span><text:span text:style-name="T6">de los valores contenidos en FDI_FECHAOPERACION, </text:span><text:span text:style-name="T5">uo_id, FDI_TIPOOPERACION </text:span><text:span text:style-name="T6">y </text:span><text:span text:style-name="T5">FDI_DOCUMENTO, </text:span><text:span text:style-name="T6">ejemplo:<text:line-break/>Formato fecha<text:tab/>Numero Fecha<text:tab/>uo_id<text:tab/>FDI_TIPOOPERACION<text:tab/>FDI_DOCUMENTO<text:tab/>IDUnico</text:span></text:p>
          <text:p text:style-name="P8">2024-07-01<text:tab/>45292<text:tab/><text:tab/>1<text:tab/><text:tab/>11<text:tab/><text:tab/>0000225<text:tab/>452921110000225</text:p>
          <text:p text:style-name="P8">2024-07-31<text:tab/>45322<text:tab/><text:tab/>1<text:tab/><text:tab/>11<text:tab/><text:tab/>0000226<text:tab/>453221110000226<text:line-break/>Creo que esto generará un idunico para cada transacción y lo insertaríamos en dtv_idunico, dtc_idunico, dti_idunico y trn_idunico, que se deben agregar a las tablas respectivas, así le <text:soft-page-break/>delegaríamos esa tarea de validación a SQLite, tomamos el mensaje que nos devuelve y le notificamos al usuario, que ya existen transacciones importadas en el periodo seleccionado</text:p>
        </text:list-item>
      </text:list>
      <text:h text:style-name="Heading_20_3" text:outline-level="3" text:is-list-header="true">📌 Prioridad</text:h>
      <text:list text:style-name="L3">
        <text:list-item>
          <text:p text:style-name="P9"><loext:content-control loext:checkbox="true" loext:checked="true" loext:checked-state="☒" loext:unchecked-state="☐" loext:id="1868254019"><text:span text:style-name="T7">☒</text:span></loext:content-control> Crítico (bloquea funcionalidad)</text:p>
        </text:list-item>
        <text:list-item>
          <text:p text:style-name="P9"><loext:content-control loext:checkbox="true" loext:checked-state="☒" loext:unchecked-state="☐" loext:id="1567257569">☐</loext:content-control> Alto (afecta funcionalidad principal)</text:p>
        </text:list-item>
        <text:list-item>
          <text:p text:style-name="P9"><loext:content-control loext:checkbox="true" loext:checked-state="☒" loext:unchecked-state="☐" loext:id="183558981">☐</loext:content-control> Medio (afecta funcionalidad secundaria)</text:p>
        </text:list-item>
        <text:list-item>
          <text:p text:style-name="P9"><loext:content-control loext:checkbox="true" loext:checked-state="☒" loext:unchecked-state="☐" loext:id="1650588139">☐</loext:content-control> Bajo (mejora o detalle estético)</text:p>
        </text:list-item>
      </text:list>
      <text:h text:style-name="Heading_20_3" text:outline-level="3" text:is-list-header="true">📎 Anexos</text:h>
      <text:list text:style-name="L4">
        <text:list-item>
          <text:p text:style-name="P10">[Capturas de pantalla / Logs / Código relevante]</text:p>
        </text:list-item>
      </text:list>
      <text:h text:style-name="Heading_20_3" text:outline-level="3" text:is-list-header="true">✅ Estado</text:h>
      <text:list text:style-name="L5">
        <text:list-item>
          <text:p text:style-name="P11"><loext:content-control loext:checkbox="true" loext:checked-state="☒" loext:unchecked-state="☐" loext:id="1591193961">☐</loext:content-control> Pendiente</text:p>
        </text:list-item>
        <text:list-item>
          <text:p text:style-name="P11"><loext:content-control loext:checkbox="true" loext:checked="true" loext:checked-state="☒" loext:unchecked-state="☐" loext:id="1882398488"><text:span text:style-name="T8">☒</text:span></loext:content-control> En análisis</text:p>
        </text:list-item>
        <text:list-item>
          <text:p text:style-name="P11"><loext:content-control loext:checkbox="true" loext:checked-state="☒" loext:unchecked-state="☐" loext:id="1033532111">☐</loext:content-control> En desarrollo</text:p>
        </text:list-item>
        <text:list-item>
          <text:p text:style-name="P11"><loext:content-control loext:checkbox="true" loext:checked-state="☒" loext:unchecked-state="☐" loext:id="194815208">☐</loext:content-control> Resuelto</text:p>
        </text:list-item>
        <text:list-item>
          <text:p text:style-name="P11"><loext:content-control loext:checkbox="true" loext:checked-state="☒" loext:unchecked-state="☐" loext:id="731650376">☐</loext:content-control> Descartado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íca</meta:initial-creator>
    <meta:creation-date>2026-06-20T10:21:01.373426600</meta:creation-date>
    <meta:generator>LibreOffice/26.2.4.1$Windows_X86_64 LibreOffice_project/1a563c585d9fd784842a5a6101a714090c4fd0fd</meta:generator>
    <dc:date>2026-06-20T12:33:32.251499900</dc:date>
    <dc:creator>Juan Ernesto Páez Mujíca</dc:creator>
    <meta:editing-duration>PT1M42S</meta:editing-duration>
    <meta:editing-cycles>2</meta:editing-cycles>
    <meta:document-statistic meta:table-count="0" meta:image-count="0" meta:object-count="0" meta:page-count="2" meta:paragraph-count="32" meta:word-count="308" meta:character-count="2079" meta:non-whitespace-character-count="1797"/>
  </office:meta>
</office:document-meta>
</file>