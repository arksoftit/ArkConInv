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5.863cm" style:rel-column-width="2184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5.863cm" style:rel-column-width="21845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able_20_Heading">
      <style:paragraph-properties fo:text-align="left" style:justify-single-word="false"/>
    </style:style>
    <style:style style:name="P5" style:family="paragraph" style:parent-style-name="Table_20_Contents">
      <style:paragraph-properties fo:text-align="left" style:justify-single-word="false"/>
    </style:style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>
      <style:paragraph-properties fo:margin-top="0cm" fo:margin-bottom="0cm" style:contextual-spacing="false"/>
    </style:style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Preformatted_20_Text">
      <style:paragraph-properties fo:margin-top="0cm" fo:margin-bottom="0.499cm" style:contextual-spacing="false"/>
    </style:style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📦 ArkConInv - Consolidación de Inventario</text:h>
      <text:p text:style-name="Text_20_body"><text:span text:style-name="T1">Versión</text:span>: 0.1.01Beta<text:line-break/><text:span text:style-name="T1">Fecha</text:span>: Junio 2026<text:line-break/><text:span text:style-name="T1">Desarrollador</text:span>: Juan E. Páez M. (JUEPAE)</text:p>
      <text:h text:style-name="Heading_20_2" text:outline-level="2">📋 Descripción</text:h>
      <text:p text:style-name="Text_20_body">Aplicación de escritorio para la <text:span text:style-name="T1">gestión y consolidación de inventarios</text:span> desde múltiples unidades operativas con bases de datos DBISAM hacia una base de datos centralizada SQLite embebida. Permite importar, visualizar y calcular existencias de inventario partiendo de saldos iniciales, sumando entradas (compras, cargos, notas de entrega de proveedores) y restando salidas (ventas, descargos, notas de entrega a clientes).</text:p>
      <text:h text:style-name="Heading_20_2" text:outline-level="2">🏗️ Arquitectura Técnica</text:h>
      <text:h text:style-name="Heading_20_3" text:outline-level="3"><text:span text:style-name="T1">Stack Tecnológico</text:span></text:h>
      <text:list text:style-name="L1">
        <text:list-item>
          <text:p text:style-name="P1"><text:span text:style-name="T1">Lenguaje</text:span>: Python 3.14.4 (32 bits) ⚠️ <text:span text:style-name="T2">Obligatorio por compatibilidad con driver ODBC</text:span></text:p>
        </text:list-item>
        <text:list-item>
          <text:p text:style-name="P1"><text:span text:style-name="T1">Base de Datos Local</text:span>: SQLite 3.48.0 (embebida)</text:p>
        </text:list-item>
        <text:list-item>
          <text:p text:style-name="P1"><text:span text:style-name="T1">Base de Datos Origen</text:span>: DBISAM 4 (solo lectura)</text:p>
        </text:list-item>
        <text:list-item>
          <text:p text:style-name="P1"><text:span text:style-name="T1">Driver ODBC</text:span>: DBISAM 4 ODBC Driver 4.29.00.01</text:p>
        </text:list-item>
        <text:list-item>
          <text:p text:style-name="P1"><text:span text:style-name="T1">Interfaz Gráfica</text:span>: tkinter/ttk</text:p>
        </text:list-item>
        <text:list-item>
          <text:p text:style-name="P1"><text:span text:style-name="T1">Conexión BD</text:span>: pyodbc</text:p>
        </text:list-item>
        <text:list-item>
          <text:p text:style-name="P1"><text:span text:style-name="T1">Empaquetado</text:span>: PyInstaller (compatible con Windows 64 bits vía WOW6432Node)</text:p>
        </text:list-item>
      </text:list>
      <text:h text:style-name="Heading_20_3" text:outline-level="3" text:is-list-header="true"><text:span text:style-name="T1">Características Técnicas</text:span></text:h>
      <text:list text:style-name="L2">
        <text:list-item>
          <text:p text:style-name="P2">Lectura de DSN desde registro de Windows (WOW6432Node para compatibilidad 32/64 bits)</text:p>
        </text:list-item>
        <text:list-item>
          <text:p text:style-name="P2">Gestión de hasta 10 conexiones ODBC recientes en <text:span text:style-name="T3">conexiones.json</text:span></text:p>
        </text:list-item>
        <text:list-item>
          <text:p text:style-name="P2">Auditoría automática de operaciones (fecha, hora, máquina, usuario)</text:p>
        </text:list-item>
        <text:list-item>
          <text:p text:style-name="P2">Threading para operaciones no bloqueantes</text:p>
        </text:list-item>
        <text:list-item>
          <text:p text:style-name="P2">Manejo de códigos alfanuméricos con ceros a la izquierda (tipo TEXT)</text:p>
        </text:list-item>
      </text:list>
      <text:h text:style-name="Heading_20_2" text:outline-level="2" text:is-list-header="true"><text:soft-page-break/>✅ Estado del Proyecto - Avance Actual</text:h>
      <text:h text:style-name="Heading_20_3" text:outline-level="3"><text:span text:style-name="T1">Módulos Completados (100%)</text:span></text:h>
      <text:h text:style-name="Heading_20_4" text:outline-level="4"><text:span text:style-name="T1">1. Configuración</text:span></text:h>
      <text:list text:style-name="L3">
        <text:list-item>
          <text:p text:style-name="P3">✅ Registro de Empresa</text:p>
        </text:list-item>
        <text:list-item>
          <text:p text:style-name="P3">✅ Unidades Operativas (con ID único y conexión ODBC independiente)</text:p>
        </text:list-item>
        <text:list-item>
          <text:p text:style-name="P3">✅ Gestión de Usuarios</text:p>
        </text:list-item>
        <text:list-item>
          <text:p text:style-name="P3">✅ Configuración de Conexiones ODBC (DSN, usuario, contraseña)</text:p>
        </text:list-item>
      </text:list>
      <text:h text:style-name="Heading_20_4" text:outline-level="4" text:is-list-header="true"><text:span text:style-name="T1">2. Importaciones desde DBISAM</text:span></text:h>
      <table:table table:name="Tabla1" table:style-name="Tabla1">
        <table:table-column table:style-name="Tabla1.A" table:number-columns-repeated="3"/>
        <table:table-header-rows>
          <table:table-row>
            <table:table-cell table:style-name="Tabla1.A1" office:value-type="string">
              <text:p text:style-name="P4">Módulo</text:p>
            </table:table-cell>
            <table:table-cell table:style-name="Tabla1.A1" office:value-type="string">
              <text:p text:style-name="P4">Registros Importados</text:p>
            </table:table-cell>
            <table:table-cell table:style-name="Tabla1.C1" office:value-type="string">
              <text:p text:style-name="P4">Estado</text:p>
            </table:table-cell>
          </table:table-row>
        </table:table-header-rows>
        <table:table-row>
          <table:table-cell table:style-name="Tabla1.A2" office:value-type="string">
            <text:p text:style-name="Table_20_Contents"><text:span text:style-name="T1">Categorías</text:span></text:p>
          </table:table-cell>
          <table:table-cell table:style-name="Tabla1.A2" office:value-type="string">
            <text:p text:style-name="P5">34</text:p>
          </table:table-cell>
          <table:table-cell table:style-name="Tabla1.C2" office:value-type="string">
            <text:p text:style-name="P5">✅ Completado</text:p>
          </table:table-cell>
        </table:table-row>
        <table:table-row>
          <table:table-cell table:style-name="Tabla1.A2" office:value-type="string">
            <text:p text:style-name="Table_20_Contents"><text:span text:style-name="T1">Depósitos</text:span></text:p>
          </table:table-cell>
          <table:table-cell table:style-name="Tabla1.A2" office:value-type="string">
            <text:p text:style-name="P5">2</text:p>
          </table:table-cell>
          <table:table-cell table:style-name="Tabla1.C2" office:value-type="string">
            <text:p text:style-name="P5">✅ Completado</text:p>
          </table:table-cell>
        </table:table-row>
        <table:table-row>
          <table:table-cell table:style-name="Tabla1.A2" office:value-type="string">
            <text:p text:style-name="Table_20_Contents"><text:span text:style-name="T1">Inventario</text:span></text:p>
          </table:table-cell>
          <table:table-cell table:style-name="Tabla1.A2" office:value-type="string">
            <text:p text:style-name="P5">4,314</text:p>
          </table:table-cell>
          <table:table-cell table:style-name="Tabla1.C2" office:value-type="string">
            <text:p text:style-name="P5">✅ Completado</text:p>
          </table:table-cell>
        </table:table-row>
      </table:table>
      <text:p text:style-name="Text_20_body"/>
      <text:p text:style-name="Text_20_body"><text:span text:style-name="T1">Características de Importación</text:span>:</text:p>
      <text:list text:style-name="L4">
        <text:list-item>
          <text:p text:style-name="P6">✅ Mensajes de éxito con conteo de registros importados</text:p>
        </text:list-item>
        <text:list-item>
          <text:p text:style-name="P6">✅ Barra de progreso visual</text:p>
        </text:list-item>
        <text:list-item>
          <text:p text:style-name="P6">✅ Conversión de tipos de datos (INTEGER → TEXT para preservar ceros a la izquierda)</text:p>
        </text:list-item>
        <text:list-item>
          <text:p text:style-name="P6">✅ Manejo de campos DECIMAL de DBISAM a FLOAT en SQLite</text:p>
        </text:list-item>
        <text:list-item>
          <text:p text:style-name="P6">✅ Auditoría automática (SystemDate, SystemTime, NameMachine, UserCreator, etc.)</text:p>
        </text:list-item>
        <text:list-item>
          <text:p text:style-name="P6">✅ Vinculación por Unidad Operativa de origen</text:p>
        </text:list-item>
      </text:list>
      <text:h text:style-name="Heading_20_4" text:outline-level="4" text:is-list-header="true"><text:span text:style-name="T1">3. Archivos Maestros (Visualización)</text:span></text:h>
      <table:table table:name="Tabla2" table:style-name="Tabla2">
        <table:table-column table:style-name="Tabla2.A" table:number-columns-repeated="3"/>
        <table:table-header-rows>
          <table:table-row>
            <table:table-cell table:style-name="Tabla2.A1" office:value-type="string">
              <text:p text:style-name="P4">Formulario</text:p>
            </table:table-cell>
            <table:table-cell table:style-name="Tabla2.A1" office:value-type="string">
              <text:p text:style-name="P4">Contador de Registros</text:p>
            </table:table-cell>
            <table:table-cell table:style-name="Tabla2.C1" office:value-type="string">
              <text:p text:style-name="P4">Estado</text:p>
            </table:table-cell>
          </table:table-row>
        </table:table-header-rows>
        <table:table-row>
          <table:table-cell table:style-name="Tabla2.A2" office:value-type="string">
            <text:p text:style-name="Table_20_Contents"><text:span text:style-name="T1">Maestro de Categorías</text:span></text:p>
          </table:table-cell>
          <table:table-cell table:style-name="Tabla2.A2" office:value-type="string">
            <text:p text:style-name="P5">✅ Visible</text:p>
          </table:table-cell>
          <table:table-cell table:style-name="Tabla2.C2" office:value-type="string">
            <text:p text:style-name="P5">Completado</text:p>
          </table:table-cell>
        </table:table-row>
        <table:table-row>
          <table:table-cell table:style-name="Tabla2.A2" office:value-type="string">
            <text:p text:style-name="Table_20_Contents"><text:span text:style-name="T1">Maestro de Depósitos</text:span></text:p>
          </table:table-cell>
          <table:table-cell table:style-name="Tabla2.A2" office:value-type="string">
            <text:p text:style-name="P5">✅ Visible</text:p>
          </table:table-cell>
          <table:table-cell table:style-name="Tabla2.C2" office:value-type="string">
            <text:p text:style-name="P5">Completado</text:p>
          </table:table-cell>
        </table:table-row>
        <table:table-row>
          <table:table-cell table:style-name="Tabla2.A2" office:value-type="string">
            <text:p text:style-name="Table_20_Contents"><text:span text:style-name="T1">Maestro de Inventario</text:span></text:p>
          </table:table-cell>
          <table:table-cell table:style-name="Tabla2.A2" office:value-type="string">
            <text:p text:style-name="P5">✅ Visible</text:p>
          </table:table-cell>
          <table:table-cell table:style-name="Tabla2.C2" office:value-type="string">
            <text:p text:style-name="P5">Completado</text:p>
          </table:table-cell>
        </table:table-row>
      </table:table>
      <text:p text:style-name="Text_20_body"/>
      <text:p text:style-name="Text_20_body"><text:span text:style-name="T1">Características de Visualización</text:span>:</text:p>
      <text:list text:style-name="L5">
        <text:list-item>
          <text:p text:style-name="P7">✅ Treeview con scrollbars</text:p>
        </text:list-item>
        <text:list-item>
          <text:p text:style-name="P7">✅ Formato de columnas adaptado (ID, Código, Descripción, Status, etc.)</text:p>
        </text:list-item>
        <text:list-item>
          <text:p text:style-name="P7">✅ Contador de registros en tiempo real ("Total de registros: X")</text:p>
        </text:list-item>
        <text:list-item>
          <text:p text:style-name="P7"><text:soft-page-break/>✅ Botón de refrescar datos</text:p>
        </text:list-item>
        <text:list-item>
          <text:p text:style-name="P7">✅ Conversión de status (1 → "Activo", 0 → "Inactivo")</text:p>
        </text:list-item>
      </text:list>
      <text:h text:style-name="Heading_20_3" text:outline-level="3" text:is-list-header="true"><text:span text:style-name="T1">Módulos Pendientes de Desarrollo</text:span></text:h>
      <text:h text:style-name="Heading_20_4" text:outline-level="4"><text:span text:style-name="T1">1. Transacciones</text:span></text:h>
      <text:list text:style-name="L6">
        <text:list-item>
          <text:p text:style-name="P8">⏳ Cálculo de Existencias por período</text:p>
          <text:list>
            <text:list-item>
              <text:p text:style-name="P9">Cálculo directo: Inventario Inicial + Entradas - Salidas</text:p>
            </text:list-item>
            <text:list-item>
              <text:p text:style-name="P9">Cálculo inverso: Para clientes sin control de saldos iniciales</text:p>
            </text:list-item>
          </text:list>
        </text:list-item>
      </text:list>
      <text:h text:style-name="Heading_20_4" text:outline-level="4" text:is-list-header="true"><text:span text:style-name="T1">2. Importaciones</text:span></text:h>
      <text:list text:style-name="L7">
        <text:list-item>
          <text:p text:style-name="P10">⏳ Importar Movimientos (compras, ventas, cargos, descargos)</text:p>
        </text:list-item>
      </text:list>
      <text:h text:style-name="Heading_20_4" text:outline-level="4" text:is-list-header="true"><text:span text:style-name="T1">3. Reportes</text:span></text:h>
      <text:list text:style-name="L8">
        <text:list-item>
          <text:p text:style-name="P11">⏳ Movimiento de Artículos Art. 177 ISLR</text:p>
        </text:list-item>
      </text:list>
      <text:h text:style-name="Heading_20_2" text:outline-level="2" text:is-list-header="true">📊 Estructura de Base de Datos SQLite</text:h>
      <text:h text:style-name="Heading_20_3" text:outline-level="3"><text:span text:style-name="T1">Tablas Implementadas</text:span></text:h>
      <text:list text:style-name="L9">
        <text:list-item>
          <text:p text:style-name="P12"><text:span text:style-name="T1">ark_company</text:span> - Datos de la empresa</text:p>
        </text:list-item>
        <text:list-item>
          <text:p text:style-name="P12"><text:span text:style-name="T1">ark_unds_operativas</text:span> - Unidades operativas con conexión ODBC</text:p>
        </text:list-item>
        <text:list-item>
          <text:p text:style-name="P12"><text:span text:style-name="T1">ark_users</text:span> - Usuarios del sistema</text:p>
        </text:list-item>
        <text:list-item>
          <text:p text:style-name="P12"><text:span text:style-name="T1">ark_categoria</text:span> - Categorías de inventario (82 campos)</text:p>
        </text:list-item>
        <text:list-item>
          <text:p text:style-name="P12"><text:span text:style-name="T1">ark_inventario</text:span> - Inventario general (91 campos)</text:p>
        </text:list-item>
        <text:list-item>
          <text:p text:style-name="P12"><text:span text:style-name="T1">ark_depositos</text:span> - Depósitos/Almacenes (18 campos)</text:p>
        </text:list-item>
      </text:list>
      <text:p text:style-name="Text_20_body"><text:span text:style-name="T1">Nota</text:span>: Todas las tablas incluyen campos de auditoría (SystemDate, SystemTime, NameMachine, UserCreator, LastUpdateDate, LastUpdateTime, LastMachine, UserLastUpdate)</text:p>
      <text:h text:style-name="Heading_20_2" text:outline-level="2">🎯 Objetivo Principal</text:h>
      <text:p text:style-name="Text_20_body">Consolidar información de inventario desde <text:span text:style-name="T1">dos o más unidades operativas</text:span> con bases de datos DBISAM, permitiendo:</text:p>
      <text:list text:style-name="L10">
        <text:list-item>
          <text:p text:style-name="P13">Centralización de datos en SQLite</text:p>
        </text:list-item>
        <text:list-item>
          <text:p text:style-name="P13">Cálculo de existencias por período configurable</text:p>
        </text:list-item>
        <text:list-item>
          <text:p text:style-name="P13">Soporte para cálculo directo e inverso de saldos</text:p>
        </text:list-item>
        <text:list-item>
          <text:p text:style-name="P13">Generación de reportes fiscales (Art. 177 ISLR)</text:p>
        </text:list-item>
      </text:list>
      <text:h text:style-name="Heading_20_2" text:outline-level="2" text:is-list-header="true"><text:soft-page-break/>🔧 Instalación y Ejecución</text:h>
      <text:h text:style-name="Heading_20_3" text:outline-level="3"><text:span text:style-name="T1">Requisitos</text:span></text:h>
      <text:list text:style-name="L11">
        <text:list-item>
          <text:p text:style-name="P14">Python 3.14.4 (32 bits)</text:p>
        </text:list-item>
        <text:list-item>
          <text:p text:style-name="P14">Windows 10/11</text:p>
        </text:list-item>
        <text:list-item>
          <text:p text:style-name="P14">DBISAM 4 ODBC Driver instalado</text:p>
        </text:list-item>
      </text:list>
      <text:h text:style-name="Heading_20_3" text:outline-level="3" text:is-list-header="true"><text:span text:style-name="T1">Dependencias</text:span></text:h>
      <text:p text:style-name="P15">pip install pyodbc pillow</text:p>
      <text:h text:style-name="Heading_20_3" text:outline-level="3"><text:span text:style-name="T1">Ejecución</text:span></text:h>
      <text:p text:style-name="P15">python src/main.py</text:p>
      <text:h text:style-name="Heading_20_3" text:outline-level="3"><text:span text:style-name="T1">Compilación a .exe</text:span></text:h>
      <text:p text:style-name="P15">pyinstaller --onefile --windowed --add-data "assets;assets" src/main.py</text:p>
      <text:h text:style-name="Heading_20_2" text:outline-level="2">📝 Directivas de Desarrollo</text:h>
      <text:list text:style-name="L12">
        <text:list-item>
          <text:p text:style-name="P16"><text:span text:style-name="T1">Paso a paso, comando a comando</text:span> - Sin saltar verificaciones</text:p>
        </text:list-item>
        <text:list-item>
          <text:p text:style-name="P16"><text:span text:style-name="T1">VS Code</text:span> - Gestión exclusiva del código en este entorno</text:p>
        </text:list-item>
        <text:list-item>
          <text:p text:style-name="P16"><text:span text:style-name="T1">Python 32 bits</text:span> - Compatibilidad estricta con driver ODBC</text:p>
        </text:list-item>
        <text:list-item>
          <text:p text:style-name="P16"><text:span text:style-name="T1">Código limpio</text:span> - Sin comentarios que estorben</text:p>
        </text:list-item>
        <text:list-item>
          <text:p text:style-name="P16"><text:span text:style-name="T1">Seguimiento por tickets</text:span> - Formato: <text:span text:style-name="T3">ACI</text:span> + <text:span text:style-name="T3">Año</text:span> + <text:span text:style-name="T3">Mes</text:span> + <text:span text:style-name="T3">Día</text:span> + <text:span text:style-name="T3">Correlativo</text:span></text:p>
        </text:list-item>
      </text:list>
      <text:h text:style-name="Heading_20_2" text:outline-level="2" text:is-list-header="true">🎬 Capturas de Pantalla</text:h>
      <text:h text:style-name="Heading_20_3" text:outline-level="3">Importación Exitosa</text:h>
      <text:list text:style-name="L13">
        <text:list-item>
          <text:p text:style-name="P17">Mensajes con conteo de registros: <text:span text:style-name="T2">"Importación de Inventario completada. Registros importados: 4314"</text:span></text:p>
        </text:list-item>
      </text:list>
      <text:h text:style-name="Heading_20_3" text:outline-level="3" text:is-list-header="true">Maestro de Inventario</text:h>
      <text:list text:style-name="L14">
        <text:list-item>
          <text:p text:style-name="P18">Visualización con 4,314 registros</text:p>
        </text:list-item>
        <text:list-item>
          <text:p text:style-name="P18">Códigos preservados con ceros a la izquierda (00000005, 00000006, etc.)</text:p>
        </text:list-item>
        <text:list-item>
          <text:p text:style-name="P18">Contador en tiempo real: <text:span text:style-name="T2">"Total de registros: 4314"</text:span></text:p>
        </text:list-item>
      </text:list>
      <text:h text:style-name="Heading_20_2" text:outline-level="2" text:is-list-header="true"><text:soft-page-break/>📅 Roadmap</text:h>
      <text:list text:style-name="L15">
        <text:list-item>
          <text:p text:style-name="P19"><loext:content-control loext:checkbox="true" loext:checked="true" loext:checked-state="☒" loext:unchecked-state="☐" loext:id="1557887927">☒</loext:content-control> Configuración de conexiones ODBC</text:p>
        </text:list-item>
        <text:list-item>
          <text:p text:style-name="P19"><loext:content-control loext:checkbox="true" loext:checked="true" loext:checked-state="☒" loext:unchecked-state="☐" loext:id="1417863985">☒</loext:content-control> Importación de Categorías</text:p>
        </text:list-item>
        <text:list-item>
          <text:p text:style-name="P19"><loext:content-control loext:checkbox="true" loext:checked="true" loext:checked-state="☒" loext:unchecked-state="☐" loext:id="1580920522">☒</loext:content-control> Importación de Depósitos</text:p>
        </text:list-item>
        <text:list-item>
          <text:p text:style-name="P19"><loext:content-control loext:checkbox="true" loext:checked="true" loext:checked-state="☒" loext:unchecked-state="☐" loext:id="318163816">☒</loext:content-control> Importación de Inventario</text:p>
        </text:list-item>
        <text:list-item>
          <text:p text:style-name="P19"><loext:content-control loext:checkbox="true" loext:checked="true" loext:checked-state="☒" loext:unchecked-state="☐" loext:id="872599364">☒</loext:content-control> Visualización de maestros con contadores</text:p>
        </text:list-item>
        <text:list-item>
          <text:p text:style-name="P19"><loext:content-control loext:checkbox="true" loext:checked-state="☒" loext:unchecked-state="☐" loext:id="1852055556">☐</loext:content-control> Importación de Movimientos</text:p>
        </text:list-item>
        <text:list-item>
          <text:p text:style-name="P19"><loext:content-control loext:checkbox="true" loext:checked-state="☒" loext:unchecked-state="☐" loext:id="1425599906">☐</loext:content-control> Cálculo de Existencias</text:p>
        </text:list-item>
        <text:list-item>
          <text:p text:style-name="P19"><loext:content-control loext:checkbox="true" loext:checked-state="☒" loext:unchecked-state="☐" loext:id="1760433958">☐</loext:content-control> Reporte Art. 177 ISLR</text:p>
        </text:list-item>
        <text:list-item>
          <text:p text:style-name="P19"><loext:content-control loext:checkbox="true" loext:checked-state="☒" loext:unchecked-state="☐" loext:id="525975507">☐</loext:content-control> Empaquetado distributable (.exe)</text:p>
        </text:list-item>
      </text:list>
      <text:h text:style-name="Heading_20_2" text:outline-level="2" text:is-list-header="true">📄 Licencia</text:h>
      <text:p text:style-name="Text_20_body">Proyecto privado desarrollado por JUEPAE - Junio 2026</text:p>
      <text:p text:style-name="Horizontal_20_Line"/>
      <text:p text:style-name="Text_20_body"><text:span text:style-name="T1">Última actualización</text:span>: 14 de junio de 2026<text:line-break/><text:span text:style-name="T1">Estado</text:span>: Desarrollo activo - Versión Beta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uan Ernesto Páez Mujíca</meta:initial-creator>
    <meta:creation-date>2026-06-14T12:12:14.459334700</meta:creation-date>
    <dc:date>2026-06-14T12:13:36.930250100</dc:date>
    <dc:creator>Juan Ernesto Páez Mujíca</dc:creator>
    <meta:editing-duration>PT1M23S</meta:editing-duration>
    <meta:editing-cycles>1</meta:editing-cycles>
    <meta:document-statistic meta:table-count="2" meta:image-count="0" meta:object-count="0" meta:page-count="5" meta:paragraph-count="126" meta:word-count="778" meta:character-count="4997" meta:non-whitespace-character-count="4402"/>
    <meta:generator>LibreOffice/26.2.3.2$Windows_X86_64 LibreOffice_project/70e089b17412e4cb7773e41413306b17a2328c34</meta:generator>
  </office:meta>
</office:document-meta>
</file>